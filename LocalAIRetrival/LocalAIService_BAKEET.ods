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table-cell-properties style:vertical-align="middle"/>
    </style:style>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middle" style:repeat-content="false"/>
      <style:paragraph-properties fo:text-align="end" fo:margin-right="0cm"/>
    </style:style>
    <style:style style:name="ce5" style:family="table-cell" style:parent-style-name="Default" style:data-style-name="N0">
      <style:table-cell-properties fo:border-top="none" fo:border-bottom="thin solid #D0D0D0" fo:border-left="thin solid #D0D0D0" fo:border-right="none" style:vertical-align="middle" fo:wrap-option="wrap" fo:background-color="#17365D" style:repeat-content="false"/>
      <style:paragraph-properties fo:text-align="center"/>
      <style:text-properties fo:color="#FFFFFF" fo:font-size="10pt" style:font-size-asian="10pt" style:font-size-complex="10pt" fo:font-weight="bold" style:font-weight-asian="bold" style:font-weight-complex="bold"/>
    </style:style>
    <style:style style:name="ce6" style:family="table-cell" style:parent-style-name="Default" style:data-style-name="N0">
      <style:table-cell-properties fo:border-top="none" fo:border-bottom="thin solid #D0D0D0" fo:border-left="none" fo:border-right="thin solid #D0D0D0" style:vertical-align="middle" fo:wrap-option="wrap" fo:background-color="#17365D" style:repeat-content="false"/>
      <style:paragraph-properties fo:text-align="center"/>
      <style:text-properties fo:color="#FFFFFF"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D0D0D0" style:vertical-align="top" fo:wrap-option="wrap"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D0D0D0" style:vertical-align="top" fo:wrap-option="wrap" style:repeat-content="false"/>
      <style:paragraph-properties fo:text-align="end" fo:margin-right="0cm"/>
      <style:text-properties fo:font-size="10pt" style:font-size-asian="10pt" style:font-size-complex="10pt"/>
    </style:style>
    <style:style style:name="ce9" style:family="table-cell" style:parent-style-name="Default" style:data-style-name="N0">
      <style:table-cell-properties fo:border-top="none" fo:border-bottom="thin solid #D0D0D0" fo:border-left="thin solid #D0D0D0" fo:border-right="thin solid #D0D0D0" style:vertical-align="middle" fo:wrap-option="wrap" fo:background-color="#17365D" style:repeat-content="false"/>
      <style:paragraph-properties fo:text-align="center"/>
      <style:text-properties fo:color="#FFFFFF" fo:font-size="10pt" style:font-size-asian="10pt" style:font-size-complex="10pt" fo:font-weight="bold" style:font-weight-asian="bold" style:font-weight-complex="bold"/>
    </style:style>
    <style:style style:name="ce10" style:family="table-cell" style:parent-style-name="Default" style:data-style-name="N0">
      <style:table-cell-properties fo:border-top="thin solid #D0D0D0" fo:border-bottom="none" fo:border-left="thin solid #D0D0D0" fo:border-right="thin solid #D0D0D0" style:vertical-align="top" fo:wrap-option="wrap" style:repeat-content="false"/>
      <style:paragraph-properties fo:text-align="start" fo:margin-left="0cm"/>
      <style:text-properties fo:font-size="10pt" style:font-size-asian="10pt" style:font-size-complex="10pt"/>
    </style:style>
    <style:style style:name="ce11" style:family="table-cell" style:parent-style-name="Default" style:data-style-name="N0">
      <style:table-cell-properties fo:border-top="thin solid #D0D0D0" fo:border-bottom="none" fo:border-left="thin solid #D0D0D0" fo:border-right="thin solid #D0D0D0" style:vertical-align="top" fo:wrap-option="wrap" style:repeat-content="false"/>
      <style:paragraph-properties fo:text-align="end" fo:margin-right="0cm"/>
      <style:text-properties fo:font-size="10pt" style:font-size-asian="10pt" style:font-size-complex="10pt"/>
    </style:style>
    <style:style style:name="ce12" style:family="table-cell" style:parent-style-name="Default" style:data-style-name="N1">
      <style:table-cell-properties fo:border-top="thin solid #D0D0D0" fo:border-bottom="thin solid #D0D0D0" fo:border-left="none" fo:border-right="thin solid #D0D0D0" style:vertical-align="top" fo:wrap-option="wrap" style:repeat-content="false"/>
      <style:paragraph-properties fo:text-align="center"/>
      <style:text-properties fo:font-size="10pt" style:font-size-asian="10pt" style:font-size-complex="10pt"/>
    </style:style>
    <style:style style:name="ce13" style:family="table-cell" style:parent-style-name="Default" style:data-style-name="N1">
      <style:table-cell-properties fo:border-top="thin solid #D0D0D0" fo:border-bottom="none" fo:border-left="none" fo:border-right="thin solid #D0D0D0" style:vertical-align="top" fo:wrap-option="wrap"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fo:border-top="thin solid #D0D0D0" fo:border-bottom="thin solid #D0D0D0" fo:border-left="thin solid #D0D0D0" fo:border-right="none" style:vertical-align="top" fo:wrap-option="wrap" style:repeat-content="false"/>
      <style:paragraph-properties fo:text-align="end" fo:margin-right="0cm"/>
      <style:text-properties fo:font-size="10pt" style:font-size-asian="10pt" style:font-size-complex="10pt"/>
    </style:style>
    <style:style style:name="ce15" style:family="table-cell" style:parent-style-name="Default" style:data-style-name="N0">
      <style:table-cell-properties fo:border-top="thin solid #D0D0D0" fo:border-bottom="none" fo:border-left="thin solid #D0D0D0" fo:border-right="none" style:vertical-align="top" fo:wrap-option="wrap" style:repeat-content="false"/>
      <style:paragraph-properties fo:text-align="end" fo:margin-right="0cm"/>
      <style:text-properties fo:font-size="10pt" style:font-size-asian="10pt" style:font-size-complex="10pt"/>
    </style:style>
    <style:style style:name="co1" style:family="table-column">
      <style:table-column-properties fo:break-before="auto" style:column-width="1.40229166666667cm"/>
    </style:style>
    <style:style style:name="co2" style:family="table-column">
      <style:table-column-properties fo:break-before="auto" style:column-width="4.57729166666667cm"/>
    </style:style>
    <style:style style:name="co3" style:family="table-column">
      <style:table-column-properties fo:break-before="auto" style:column-width="7.27604166666667cm"/>
    </style:style>
    <style:style style:name="co4" style:family="table-column">
      <style:table-column-properties fo:break-before="auto" style:column-width="10.5833333333333cm"/>
    </style:style>
    <style:style style:name="co5" style:family="table-column">
      <style:table-column-properties fo:break-before="auto" style:column-width="6.6675cm"/>
    </style:style>
    <style:style style:name="co6" style:family="table-column">
      <style:table-column-properties fo:break-before="auto" style:column-width="1.69333333333333cm"/>
    </style:style>
    <style:style style:name="ro1" style:family="table-row">
      <style:table-row-properties style:row-height="23.25pt" style:use-optimal-row-height="false" fo:break-before="auto"/>
    </style:style>
    <style:style style:name="ro2" style:family="table-row">
      <style:table-row-properties style:row-height="38.25pt" style:use-optimal-row-height="false" fo:break-before="auto"/>
    </style:style>
    <style:style style:name="ro3" style:family="table-row">
      <style:table-row-properties style:row-height="53.25pt" style:use-optimal-row-height="false" fo:break-before="auto"/>
    </style:style>
    <style:style style:name="ro4" style:family="table-row">
      <style:table-row-properties style:row-height="68.25pt" style:use-optimal-row-height="false" fo:break-before="auto"/>
    </style:style>
    <style:style style:name="ro5" style:family="table-row">
      <style:table-row-properties style:row-height="83.25pt" style:use-optimal-row-height="fals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Question_Set" table:style-name="ta1">
        <table:table-column table:style-name="co1" table:default-cell-style-name="ce2"/>
        <table:table-column table:style-name="co2" table:default-cell-style-name="ce1"/>
        <table:table-column table:style-name="co3" table:default-cell-style-name="ce3"/>
        <table:table-column table:style-name="co4" table:default-cell-style-name="ce3"/>
        <table:table-column table:style-name="co5" table:default-cell-style-name="ce4"/>
        <table:table-column table:style-name="co4" table:default-cell-style-name="ce4"/>
        <table:table-column table:style-name="co6" table:number-columns-repeated="16378" table:default-cell-style-name="ce1"/>
        <table:table-row table:style-name="ro1">
          <table:table-cell office:value-type="string" table:style-name="ce6">
            <text:p>ID</text:p>
          </table:table-cell>
          <table:table-cell office:value-type="string" table:style-name="ce9">
            <text:p>Category</text:p>
          </table:table-cell>
          <table:table-cell office:value-type="string" table:style-name="ce9">
            <text:p>prompt_en</text:p>
          </table:table-cell>
          <table:table-cell office:value-type="string" table:style-name="ce9">
            <text:p>response_en</text:p>
          </table:table-cell>
          <table:table-cell office:value-type="string" table:style-name="ce9">
            <text:p>prompt_ar</text:p>
          </table:table-cell>
          <table:table-cell office:value-type="string" table:style-name="ce5">
            <text:p>response_ar</text:p>
          </table:table-cell>
          <table:table-cell table:number-columns-repeated="16378"/>
        </table:table-row>
        <table:table-row table:style-name="ro2">
          <table:table-cell office:value-type="float" office:value="1" table:style-name="ce12">
            <text:p>1</text:p>
          </table:table-cell>
          <table:table-cell office:value-type="string" table:style-name="ce7">
            <text:p>Factual Retrieval</text:p>
          </table:table-cell>
          <table:table-cell office:value-type="string" table:style-name="ce7">
            <text:p>What is Bakeet, and how does it define itself beyond being an e-commerce platform?</text:p>
          </table:table-cell>
          <table:table-cell office:value-type="string" table:style-name="ce7">
            <text:p>Bakeet defines itself not merely as a marketplace or e-commerce platform, but as a **connected operating model** and a **unified ecosystem** designed to support every stage of a merchant’s commercial journey.</text:p>
            <text:p/>
            <text:p>Beyond traditional e-commerce, Bakeet is characterized by:</text:p>
            <text:p/>
            <text:p>1. <text:s/>**Interconnected Capabilities:** It is viewed as an integrated system where every capability strengthens the others, rather than a collection of independent services.</text:p>
            <text:p>2. <text:s/>**Three Unified Business Lines:** It operates through three primary lines that create a single customer and merchant experience:</text:p>
            <text:p><text:s text:c="4"/>* <text:s text:c="2"/>**Commerce Platform:** The digital foundation comprising the Customer Platform (for discovery and purchasing) and the Merchant Workspace (for operational tools to manage and grow business).</text:p>
            <text:p><text:s text:c="4"/>* <text:s text:c="2"/>**Logistics &amp; Fulfillment:** The unit that transforms digital transactions into real-world experiences by coordinating pickup, assembly, and delivery, with plans to extend logistics services to merchants selling outside the Bakeet marketplace.</text:p>
            <text:p><text:s text:c="4"/>* <text:s text:c="2"/>**Social Commerce Business Unit:** A unit that operates Bakeet-owned commercial brands, handling sourcing, inventory, content production, and social sales channels, distinct from the independent merchant model.</text:p>
            <text:p/>
            <text:p>In essence, Bakeet is a comprehensive infrastructure that enables merchants to establish, manage, and expand their businesses while providing customers with a simple, reliable, and enjoyable shopping experience.</text:p>
          </table:table-cell>
          <table:table-cell office:value-type="string" table:style-name="ce8">
            <text:p>ما هي باكيت، وكيف تُعرّف نفسها بما يتجاوز كونها منصة تجارة إلكترونية؟</text:p>
          </table:table-cell>
          <table:table-cell office:value-type="string" table:style-name="ce14">
            <text:p>باكيت هي شركة بنية تحتية تجارية (commerce infrastructure company) صُممت لتبسيط كيفية قيام التجار بالبيع، والتشغيل، والتوصيل، والنمو.</text:p>
            <text:p/>
            <text:p>وتُعرّف نفسها بما يتجاوز كونها مجرد منصة للتجارة الإلكترونية بأنها "نموذج تشغيلي متصل" ونظام بيئي متكامل (ecosystem) مصمم لدعم كل مرحلة من مراحل الرحلة التجارية للتاجر، حيث لا تُعتبر مجرد مجموعة من الخدمات المستقلة، بل بنية تحتية رقمية تهدف إلى تمكين التجار من تأسيس وإدارة وتوسيع أعمالهم.</text:p>
          </table:table-cell>
          <table:table-cell table:number-columns-repeated="16378"/>
        </table:table-row>
        <table:table-row table:style-name="ro2">
          <table:table-cell office:value-type="float" office:value="2" table:style-name="ce12">
            <text:p>2</text:p>
          </table:table-cell>
          <table:table-cell office:value-type="string" table:style-name="ce7">
            <text:p>Factual Retrieval</text:p>
          </table:table-cell>
          <table:table-cell office:value-type="string" table:style-name="ce7">
            <text:p>What are the three primary business lines of Bakeet, and what does each one own?</text:p>
          </table:table-cell>
          <table:table-cell office:value-type="string" table:style-name="ce7">
            <text:p>Based on the provided context, the three primary business lines of Bakeet and their respective ownership are:</text:p>
            <text:p/>
            <text:p>1. <text:s/>**Commerce Platform**</text:p>
            <text:p><text:s text:c="4"/>* <text:s text:c="2"/>**Owns:** The Customer Platform and the Merchant Workspace.</text:p>
            <text:p>2. <text:s/>**Logistics &amp; Fulfillment**</text:p>
            <text:p><text:s text:c="4"/>* <text:s text:c="2"/>**Owns:** The context describes its function (transforming digital transactions into real-world experiences by coordinating pickup, assembly, and delivery) but does not explicitly list specific assets it "owns" in the same manner as the other units.</text:p>
            <text:p>3. <text:s/>**Social Commerce Business Unit**</text:p>
            <text:p><text:s text:c="4"/>* <text:s text:c="2"/>**Owns:**</text:p>
            <text:p><text:s text:c="8"/>* <text:s text:c="2"/>Bakeet-owned brands.</text:p>
            <text:p><text:s text:c="8"/>* <text:s text:c="2"/>Product portfolios.</text:p>
            <text:p><text:s text:c="8"/>* <text:s text:c="2"/>Content strategy.</text:p>
          </table:table-cell>
          <table:table-cell office:value-type="string" table:style-name="ce8">
            <text:p>ما هي خطوط الأعمال الرئيسية الثلاثة في باكيت، وما الذي يمتلكه كل خط منها؟</text:p>
          </table:table-cell>
          <table:table-cell office:value-type="string" table:style-name="ce14">
            <text:p>تعتمد باكيت على ثلاثة خطوط أعمال رئيسية تعمل معاً لتوفير تجربة موحدة للعملاء والتجار، وهي كالتالي:</text:p>
            <text:p/>
            <text:p>1. **منصة التجارة (Commerce Platform):** تمثل الأساس الرقمي لباكيت وتعمل كبنية تحتية رقمية تمكن العملاء من الوصول إلى الخدمات.</text:p>
            <text:p>2. **الخدمات اللوجستية والتنفيذ (Logistics &amp; Fulfillment):** يتولى هذا الخط تحويل المعاملات الرقمية إلى تجارب واقعية، حيث يمتلك مسؤولية تنسيق عمليات الاستلام، والتجميع، والتوصيل، وخدمات التنفيذ المستقبلية، بالإضافة إلى تقديم خدمات لوجستية للتجار الذين يبيعون خارج سوق باكيت.</text:p>
            <text:p>3. **وحدة أعمال التجارة الاجتماعية (Social Commerce Business Unit):** تتولى إدارة العلامات التجارية المملوكة لباكيت، ويمتلك هذا الخط ما يلي:</text:p>
            <text:p><text:s text:c="4"/>* العلامات التجارية المملوكة لباكيت.</text:p>
            <text:p><text:s text:c="4"/>* محافظ المنتجات (Product portfolios).</text:p>
            <text:p><text:s text:c="4"/>* استراتيجية المحتوى.</text:p>
            <text:p><text:s text:c="4"/>* كما يتولى مسؤولية توريد المنتجات، إدارة المخزون، إنتاج المحتوى، وتشغيل قنوات البيع الاجتماعية.</text:p>
          </table:table-cell>
          <table:table-cell table:number-columns-repeated="16378"/>
        </table:table-row>
        <table:table-row table:style-name="ro2">
          <table:table-cell office:value-type="float" office:value="3" table:style-name="ce12">
            <text:p>3</text:p>
          </table:table-cell>
          <table:table-cell office:value-type="string" table:style-name="ce7">
            <text:p>Factual Retrieval</text:p>
          </table:table-cell>
          <table:table-cell office:value-type="string" table:style-name="ce7">
            <text:p>What is the role of the Maestro Office, and how is it different from a traditional PMO?</text:p>
          </table:table-cell>
          <table:table-cell office:value-type="string" table:style-name="ce7">
            <text:p>The Maestro Office serves as the organization's operational command center, responsible for translating strategy into execution, monitoring organizational performance, removing operational obstacles, and maintaining alignment across every business unit. Its core mission is to ensure that Bakeet operates as one unified company rather than independent departments.</text:p>
            <text:p/>
            <text:p>It differs from a traditional Project Management Office (PMO) in that it does not own operational execution. Instead, the Maestro Office owns **operational visibility**. It provides leadership with a clear understanding of company performance, identifies bottlenecks, and determines which initiatives require executive attention, while the actual execution remains the responsibility of the respective business units.</text:p>
          </table:table-cell>
          <table:table-cell office:value-type="string" table:style-name="ce8">
            <text:p>ما هو دور مكتب المايسترو (Maestro Office)، وكيف يختلف عن مكتب إدارة المشاريع التقليدي؟</text:p>
          </table:table-cell>
          <table:table-cell office:value-type="string" table:style-name="ce14">
            <text:p>يعمل **مكتب المايسترو (Maestro Office)** كمركز قيادة عملياتي لشركة باكيت، ودوره الأساسي هو ضمان تحرك الجميع في نفس الاتجاه وتحويل الاستراتيجية إلى تنفيذ فعلي. وتتلخص مهامه في:</text:p>
            <text:p>* <text:s text:c="2"/>**مراقبة الأداء:** متابعة مؤشرات الأداء الرئيسية (KPIs) على مستوى الشركة بالكامل.</text:p>
            <text:p>* <text:s text:c="2"/>**التنسيق:** تنسيق المبادرات العابرة للإدارات (cross-functional) لضمان أن تعمل باكيت كشركة واحدة وليس كأقسام مستقلة.</text:p>
            <text:p>* <text:s text:c="2"/>**الدعم القيادي:** إعداد الاجتماعات التنفيذية وتوفير رؤية واضحة للقيادة حول كيفية أداء الشركة وأماكن وجود الاختناقات.</text:p>
            <text:p>* <text:s text:c="2"/>**إزالة العقبات:** تحديد العوائق التشغيلية والعمل على حلها لضمان سير المبادرات الاستراتيجية دون تأخير.</text:p>
            <text:p/>
            <text:p>**أما عن وجه الاختلاف بينه وبين مكتب إدارة المشاريع (PMO) التقليدي:**</text:p>
            <text:p>الاختلاف الجوهري يكمن في "الملكية"؛ فبينما قد يتدخل مكتب إدارة المشاريع التقليدي في تفاصيل التنفيذ، فإن مكتب المايسترو **لا يمتلك التنفيذ التشغيلي** (حيث يظل التنفيذ مسؤولية وحدة الأعمال المعنية)، بل **يمتلك "الرؤية التشغيلية" (Operational Visibility)**.<text:s/></text:p>
            <text:p/>
            <text:p>بمعنى آخر، مكتب المايسترو لا يقوم بالعمل بنفسه، بل يضمن أن العمل يتم تنفيذه وفقاً للاستراتيجية، ويوفر الشفافية والبيانات اللازمة للقيادة لاتخاذ القرارات.</text:p>
          </table:table-cell>
          <table:table-cell table:number-columns-repeated="16378"/>
        </table:table-row>
        <table:table-row table:style-name="ro3">
          <table:table-cell office:value-type="float" office:value="4" table:style-name="ce12">
            <text:p>4</text:p>
          </table:table-cell>
          <table:table-cell office:value-type="string" table:style-name="ce7">
            <text:p>Factual Retrieval</text:p>
          </table:table-cell>
          <table:table-cell office:value-type="string" table:style-name="ce7">
            <text:p>Who is Bakeet's strategic technology partner, and what exactly do they own versus what Bakeet owns?</text:p>
          </table:table-cell>
          <table:table-cell office:value-type="string" table:style-name="ce7">
            <text:p>Bakeet's strategic technology partner is **101**.</text:p>
            <text:p/>
            <text:p>The division of ownership is defined as follows:</text:p>
            <text:p/>
            <text:p>**101 Owns:**</text:p>
            <text:p>* <text:s text:c="2"/>Technology execution</text:p>
            <text:p>* <text:s text:c="2"/>Technology delivery</text:p>
            <text:p>* <text:s text:c="2"/>Software quality</text:p>
            <text:p>* <text:s text:c="2"/>Technical architecture</text:p>
            <text:p>* <text:s text:c="2"/>Infrastructure reliability</text:p>
            <text:p>* <text:s text:c="2"/>Deployment quality</text:p>
            <text:p/>
            <text:p>**Bakeet Owns:**</text:p>
            <text:p>* <text:s text:c="2"/>The product</text:p>
            <text:p>* <text:s text:c="2"/>The customer</text:p>
            <text:p>* <text:s text:c="2"/>The operational model</text:p>
            <text:p>* <text:s text:c="2"/>The vision (which technology enables)</text:p>
            <text:p/>
            <text:p>Bakeet retains ownership of product strategy, while 101 is responsible for transforming business requirements into scalable, secure, and reliable digital solutions.</text:p>
          </table:table-cell>
          <table:table-cell office:value-type="string" table:style-name="ce8">
            <text:p>من هو الشريك التقني الاستراتيجي لباكيت، وما الذي يمتلكه هذا الشريك مقابل ما تمتلكه باكيت؟</text:p>
          </table:table-cell>
          <table:table-cell office:value-type="string" table:style-name="ce14">
            <text:p>الشريك التقني الاستراتيجي لباكيت هو **101**.</text:p>
            <text:p/>
            <text:p>تعتمد العلاقة بين الطرفين على فصل دقيق بين "ملكية الأعمال" و"تنفيذ التكنولوجيا"، وذلك وفقاً للتالي:</text:p>
            <text:p/>
            <text:p>**ما تمتلكه باكيت (Bakeet):**</text:p>
            <text:p>* <text:s text:c="2"/>**المنتج (The Product):** تملك باكيت المنتج النهائي.</text:p>
            <text:p>* <text:s text:c="2"/>**العميل (The Customer):** تملك العلاقة مع العملاء.</text:p>
            <text:p>* <text:s text:c="2"/>**النموذج التشغيلي (The Operational Model):** تملك كيفية إدارة العمليات.</text:p>
            <text:p>* <text:s text:c="2"/>**الرؤية (The Vision):** الأعمال هي من تحدد الرؤية التي تقوم التكنولوجيا بتمكينها.</text:p>
            <text:p/>
            <text:p>**ما يمتلكه الشريك التقني (101):**</text:p>
            <text:p>* <text:s text:c="2"/>**تنفيذ التكنولوجيا (Technology Execution):** مسؤول عن تحويل متطلبات العمل إلى حلول رقمية.</text:p>
            <text:p>* <text:s text:c="2"/>**تسليم التكنولوجيا (Technology Delivery):** يملك عملية التسليم الفني.</text:p>
            <text:p>* <text:s text:c="2"/>**جودة البرمجيات (Software Quality):** مسؤول عن جودة الأكواد والبرامج.</text:p>
            <text:p>* <text:s text:c="2"/>**البنية التحتية التقنية (Technical Architecture):** يملك تصميم البنية التحتية.</text:p>
            <text:p>* <text:s text:c="2"/>**موثوقية البنية التحتية (Infrastructure Reliability):** يضمن استقرار الأنظمة.</text:p>
            <text:p>* <text:s text:c="2"/>**جودة النشر (Deployment Quality):** يملك عملية إطلاق التحديثات والبرمجيات.</text:p>
            <text:p/>
            <text:p>**ملاحظة هامة:** لا يمتلك الشريك (101) "استراتيجية المنتج"، بل هي مسؤولية مشتركة مع باكيت.</text:p>
          </table:table-cell>
          <table:table-cell table:number-columns-repeated="16378"/>
        </table:table-row>
        <table:table-row table:style-name="ro2">
          <table:table-cell office:value-type="float" office:value="5" table:style-name="ce12">
            <text:p>5</text:p>
          </table:table-cell>
          <table:table-cell office:value-type="string" table:style-name="ce7">
            <text:p>Factual Retrieval</text:p>
          </table:table-cell>
          <table:table-cell office:value-type="string" table:style-name="ce7">
            <text:p>What is the single objective that every decision at Bakeet must contribute to?</text:p>
          </table:table-cell>
          <table:table-cell office:value-type="string" table:style-name="ce7">
            <text:p>The single objective that every decision at Bakeet must contribute to is: **“Helping merchants grow”**</text:p>
          </table:table-cell>
          <table:table-cell office:value-type="string" table:style-name="ce8">
            <text:p>ما هو الهدف الوحيد الذي يجب أن يساهم فيه كل قرار داخل باكيت؟</text:p>
          </table:table-cell>
          <table:table-cell office:value-type="string" table:style-name="ce14">
            <text:p>الهدف الوحيد الذي يجب أن يساهم فيه كل قرار يتم اتخاذه داخل باكيت هو: **"مساعدة التجار على النمو" (Helping merchants grow)**.</text:p>
          </table:table-cell>
          <table:table-cell table:number-columns-repeated="16378"/>
        </table:table-row>
        <table:table-row table:style-name="ro3">
          <table:table-cell office:value-type="float" office:value="6" table:style-name="ce12">
            <text:p>6</text:p>
          </table:table-cell>
          <table:table-cell office:value-type="string" table:style-name="ce7">
            <text:p>Business Model &amp; Strategy</text:p>
          </table:table-cell>
          <table:table-cell office:value-type="string" table:style-name="ce7">
            <text:p>Explain Bakeet's transition "from marketplace to commerce infrastructure." What does this mean practically?</text:p>
          </table:table-cell>
          <table:table-cell office:value-type="string" table:style-name="ce7">
            <text:p>Practically, Bakeet’s transition from a "marketplace" to a "commerce infrastructure" company means shifting its identity from being defined by specific products or services to being defined by the problems it solves.</text:p>
            <text:p/>
            <text:p>Here is what this means in practice, based on the provided context:</text:p>
            <text:p/>
            <text:p>**1. Integrated Operating Environment vs. Independent Services**</text:p>
            <text:p>* <text:s text:c="2"/>**Marketplace View:** Traditionally, an organization might be seen as a collection of independent services (e.g., just a delivery network or just a payment processor).</text:p>
            <text:p>* <text:s text:c="2"/>**Infrastructure View:** Bakeet views capabilities like delivery, merchant management, payments, fulfillment, and AI as parts of one **integrated operating environment**. None of these capabilities defines Bakeet alone; together, they form the foundation upon which merchants build their businesses.</text:p>
            <text:p/>
            <text:p>**2. Value Beyond the Platform**</text:p>
            <text:p>* <text:s text:c="2"/>Bakeet’s infrastructure is designed to support commerce even outside its own marketplace. For example, its **Fulfillment business line** will eventually provide logistics services for merchants selling *outside* the Bakeet platform, extending the value of its infrastructure beyond the platform itself.</text:p>
            <text:p/>
            <text:p>**3. Dual-Faced Digital Experience**</text:p>
            <text:p>* <text:s text:c="2"/>The infrastructure consists of two connected parts that cannot succeed without each other:</text:p>
            <text:p><text:s text:c="4"/>* <text:s text:c="2"/>**Customer Platform:** Provides a simple, reliable, and enjoyable shopping experience.</text:p>
            <text:p><text:s text:c="4"/>* <text:s text:c="2"/>**Merchant Workspace:** Provides the operational tools merchants need to establish, manage, and expand their businesses.</text:p>
            <text:p/>
            <text:p>**4. Focus on Simplicity and Growth**</text:p>
            <text:p>* <text:s text:c="2"/>Every capability within Bakeet exists for one primary reason: **to simplify commerce**.</text:p>
            <text:p>* <text:s text:c="2"/>Bakeet defines itself not by the number of applications it builds, but by the value it creates for merchants. It aims to be the invisible but essential "infrastructure" (like a city's foundational systems) that allows commerce to grow.</text:p>
            <text:p/>
            <text:p>In essence, Bakeet is moving from being a place where transactions happen (a marketplace) to being the underlying digital and operational backbone that enables *any* merchant to conduct and grow their commerce, whether inside or outside Bakeet.</text:p>
          </table:table-cell>
          <table:table-cell office:value-type="string" table:style-name="ce8">
            <text:p>اشرح تحوّل باكيت "من سوق إلكتروني إلى بنية تحتية للتجارة". ماذا يعني ذلك عملياً؟</text:p>
          </table:table-cell>
          <table:table-cell office:value-type="string" table:style-name="ce14">
            <text:p>يعني تحول باكيت من مجرد "سوق إلكتروني" إلى "بنية تحتية للتجارة" عملياً أنه لم يعد يقتصر على مجرد توفير منصة لبيع وشراء المنتجات، بل أصبح يؤسس للنظام الرقمي الكامل الذي يدعم التجارة الحديثة.</text:p>
            <text:p/>
            <text:p>هذا التحول يتجلى في عدة نقاط أساسية:</text:p>
            <text:p/>
            <text:p>1. **توفير الأدوات الإدارية الكاملة للجهات البائعة:**</text:p>
            <text:p><text:s text:c="3"/>- باكيت لا تكتفي بعرض المنتجات فقط، بل توفر لـ "جهات البائع" (Merchants) بيئة تشغيلية كاملة لإدارة كل جانب من جوانب تجارتهم اليومية.</text:p>
            <text:p><text:s text:c="3"/>- هذا يعني أن باكيت أصبحت تساعد في تأسيس وإدارة وتوسيع الأعمال التجارية، وليس فقط عرضها.</text:p>
            <text:p/>
            <text:p>2. **تجربة متكاملة للعميل:**</text:p>
            <text:p><text:s text:c="3"/>- بالنسبة للعملاء، تقدم باكيت تجربة تسوق سلسة وموثوقة وممتعة.</text:p>
            <text:p><text:s text:c="3"/>- هذه التجربة ليست منفصلة عن تجربة البائع، بل هي جزء من نظام واحد متصل.</text:p>
            <text:p/>
            <text:p>3. **منصة موحدة تربط بين العميل والبائع:**</text:p>
            <text:p><text:s text:c="3"/>- يتم بناء هذه البنية التحتية من خلال وحدتين أساسيتين:</text:p>
            <text:p><text:s text:c="5"/>- **منصة العميل (Customer Platform):** التي تمثل التجربة الموجهة للعميل.</text:p>
            <text:p><text:s text:c="5"/>- **مساحة عمل البائع (Merchant Workspace):** التي تمثل التجربة التشغيلية الموجهة للجهة البائعة.</text:p>
            <text:p><text:s text:c="3"/>- كل من هاتين الوحدتين تعتمد على الأخرى ولا يمكن لأحدهما النجاح دون الأخرى.</text:p>
            <text:p/>
            <text:p>4. **تحويل المعاملات الرقمية إلى تجارب حقيقية:**</text:p>
            <text:p><text:s text:c="3"/>- من خلال خطوط الأعمال المختلفة مثل "الخدمات اللوجستية والتسليم" و"التجارة الاجتماعية"، تتعامل باكيت مع تحويل المعاملات الرقمية إلى تجارب حقيقية للزبائن.</text:p>
            <text:p><text:s text:c="3"/>- هذا يشمل تنسيق عمليات الاستلام والتجميع والتسليم، وحتى تقديم خدمات لوجستية للجهات البائعة خارج منصة باكيت نفسها.</text:p>
            <text:p/>
            <text:p>5. **دعم رحلة التجارة الكاملة:**</text:p>
            <text:p><text:s text:c="3"/>- عندما تنضم جهة بائعة إلى باكيت، فإنها لا تنضم فقط إلى سوق إلكتروني، بل تنضم إلى نظام بيئي مصمم لدعم كل مرحلة من مراحل رحلتها التجارية، من الاكتشاف والتسويق إلى التنفيذ والتسليم.</text:p>
            <text:p/>
            <text:p>باختصار، باكيت أصبحت "بنية تحتية للتجارة" لأنها توفر الأدوات والبنية التحتية الرقمية والتشغيلية التي تمكن جهات البائع من إدارة أعمالهم بنجاح، وتمكن العملاء من تجربة تسوق سلسة، مما يخلق نظامًا متكاملاً يدعم التجارة بشكل أشمل وأكثر استدامة من مجرد سوق إلكتروني تقليدي.</text:p>
          </table:table-cell>
          <table:table-cell table:number-columns-repeated="16378"/>
        </table:table-row>
        <table:table-row table:style-name="ro2">
          <table:table-cell office:value-type="float" office:value="7" table:style-name="ce12">
            <text:p>7</text:p>
          </table:table-cell>
          <table:table-cell office:value-type="string" table:style-name="ce7">
            <text:p>Business Model &amp; Strategy</text:p>
          </table:table-cell>
          <table:table-cell office:value-type="string" table:style-name="ce7">
            <text:p>What decision-making filter does Bakeet use when evaluating new opportunities or features?</text:p>
          </table:table-cell>
          <table:table-cell office:value-type="string" table:style-name="ce7">
            <text:p>When evaluating new opportunities or features, Bakeet uses the following decision-making filter:</text:p>
            <text:p/>
            <text:p>Instead of asking, **"Can we build this feature?"**</text:p>
            <text:p/>
            <text:p>They ask: **"Does this strengthen the commerce infrastructure?"**</text:p>
            <text:p/>
            <text:p>* <text:s text:c="2"/>If the answer is **yes**, the opportunity belongs within Bakeet.</text:p>
            <text:p>* <text:s text:c="2"/>If the answer is **no**, it is considered just another feature without strategic value and is rejected.</text:p>
            <text:p/>
            <text:p>This filter protects the company from building products that create complexity without creating direction.</text:p>
          </table:table-cell>
          <table:table-cell office:value-type="string" table:style-name="ce8">
            <text:p>ما هو المعيار الذي تستخدمه باكيت لاتخاذ القرار عند تقييم الفرص أو الميزات الجديدة؟</text:p>
          </table:table-cell>
          <table:table-cell office:value-type="string" table:style-name="ce14">
            <text:p>المعيار الأساسي الذي تستخدمه باكيت لاتخاذ القرار عند تقييم أي فرصة أو ميزة جديدة ليس السؤال التقليلي "هل يمكننا بناء هذه الميزة؟"، بل السؤال الاستراتيجي: **"هل يعزز هذا البنية التحتية للتجارة؟" (Does this strengthen the commerce infrastructure?)**.</text:p>
            <text:p/>
            <text:p>إذا كانت الإجابة **نعم**، فإن الميزة أو الفرصة تنتمي ضمن رؤية باكيت واستراتيجيتها. أما إذا كانت الإجابة **لا**، فإنها تُعتبر مجرد ميزة عابرة تفتقر إلى قيمة استراتيجية، ويتم تجنبها.</text:p>
            <text:p/>
            <text:p>هذا المعيار يهدف إلى حماية الشركة من بناء منتجات تخلق تعقيداً دون توجيه استراتيجي، ويضمن أن كل قرار يتخذ يخدم الهوية الأعمق لباكيت كشركة "بنية تحتية للتجارة" وليس مجرد مجموعة من الميزات المتناثرة.</text:p>
          </table:table-cell>
          <table:table-cell table:number-columns-repeated="16378"/>
        </table:table-row>
        <table:table-row table:style-name="ro3">
          <table:table-cell office:value-type="float" office:value="8" table:style-name="ce12">
            <text:p>8</text:p>
          </table:table-cell>
          <table:table-cell office:value-type="string" table:style-name="ce7">
            <text:p>Business Model &amp; Strategy</text:p>
          </table:table-cell>
          <table:table-cell office:value-type="string" table:style-name="ce7">
            <text:p>Why does Bakeet operate its own brands through the Social Commerce Business Unit, and what strategic advantage does this create?</text:p>
          </table:table-cell>
          <table:table-cell office:value-type="string" table:style-name="ce7">
            <text:p>Bakeet operates its own brands through the **Social Commerce Business Unit** to function as its own first customer and to experience the same operational challenges faced by the merchants it serves.</text:p>
            <text:p/>
            <text:p>**Strategic Advantages:**</text:p>
            <text:p/>
            <text:p>* <text:s text:c="2"/>**Living Laboratory:** The unit serves as a testing ground where Bakeet can validate assumptions, identify inefficiencies, and develop solutions before rolling them out to the wider merchant community.</text:p>
            <text:p>* <text:s text:c="2"/>**Product Improvement:** Every lesson learned in sourcing, inventory, content creation, and fulfillment directly informs and improves the tools and services provided to other merchants on the platform.</text:p>
            <text:p>* <text:s text:c="2"/>**Firsthand Experience:** By acting as a merchant rather than just a technology provider, Bakeet ensures its infrastructure is built on real-world operational realities rather than abstract assumptions.</text:p>
            <text:p/>
            <text:p>As stated in the context, this creates a unique advantage: **"Bakeet does not simply build tools for merchants, Bakeet uses them every day."**</text:p>
          </table:table-cell>
          <table:table-cell office:value-type="string" table:style-name="ce8">
            <text:p>لماذا تدير باكيت علاماتها التجارية الخاصة من خلال وحدة التجارة الاجتماعية، وما الميزة الاستراتيجية التي يخلقها ذلك؟</text:p>
          </table:table-cell>
          <table:table-cell office:value-type="string" table:style-name="ce14">
            <text:p>تدير باكيت علاماتها التجارية الخاصة من خلال وحدة التجارة الاجتماعية (Social Commerce Business Unit) لسبب جوهري يتمثل في الفلسفة القائلة بأن "أحد أكثر الطرق فعالية لبناء منتجات أفضل هو تجربة التحديات نفسها التي يواجهها الأشخاص الذين صُممت من أجلهم تلك المنتجات".</text:p>
            <text:p/>
            <text:p>عملياً، هذا يعني أن باكيت لا تعمل فقط كمزود تقني (Technology Provider) للمنصة، بل تعمل أيضاً كـ **تاجر (Merchant)** بنفسها. من خلال القيام بذلك، تتعرض المنظمة شخصياً لكل التحديات التشغيلية التي قد يواجهها البائعون الآخرون، مثل:</text:p>
            <text:p/>
            <text:p>* <text:s text:c="2"/>sourcing المنتجات.</text:p>
            <text:p>* <text:s text:c="2"/>إدارة المخزون.</text:p>
            <text:p>* <text:s text:c="2"/>إنشاء المحتوى.</text:p>
            <text:p>* <text:s text:c="2"/>تنفيذ الحملات.</text:p>
            <text:p>* <text:s text:c="2"/>التفاعل مع العملاء.</text:p>
            <text:p>* <text:s text:c="2"/>تنفيذ الطلبات وإرجاع المنتجات.</text:p>
            <text:p/>
            <text:p>**الميزة الاستراتيجية التي يخلقها ذلك:**</text:p>
            <text:p/>
            <text:p>1. <text:s/>**مختبر حي (Living Laboratory):** تعمل الوحدة كمختبر تجريبي للمنظمة. كل تجربة، حملة، تحسين تشغيلي، وتفاعل مع العملاء يولد معرفة تعزز النظام البيئي بأكمله في باكيت.</text:p>
            <text:p>2. <text:s/>**التحقق من الفرضيات وتطوير الحلول مسبقاً:** من خلال تشغيل علاماتها التجارية الخاصة، تقوم باكيت بتأكيد الفرضيات وتحديد عدم الكفاءة التشغيلية وتطوير الحلول *قبل* طرحها على مجتمع البائعين الأوسع.</text:p>
            <text:p>3. <text:s/>**بناء الأدوات من خلال الاستخدام اليومي:** تخلق هذه الاستراتيجية ميزة فريدة تتمثل في أن باكيت لا تبني الأدوات للبائعين فقط، بل **تستخدمها كل يوم**. هذا يضمن أن الأدوات مصممة بناءً على تجربة حقيقية ومستمرة، مما يمنح باكيت ميزة تنافسية نادرة في منصات التجارة الإلكترونية.</text:p>
          </table:table-cell>
          <table:table-cell table:number-columns-repeated="16378"/>
        </table:table-row>
        <table:table-row table:style-name="ro2">
          <table:table-cell office:value-type="float" office:value="9" table:style-name="ce12">
            <text:p>9</text:p>
          </table:table-cell>
          <table:table-cell office:value-type="string" table:style-name="ce7">
            <text:p>Business Model &amp; Strategy</text:p>
          </table:table-cell>
          <table:table-cell office:value-type="string" table:style-name="ce7">
            <text:p>How does Bakeet plan to extend its logistics services beyond its own marketplace?</text:p>
          </table:table-cell>
          <table:table-cell office:value-type="string" table:style-name="ce7">
            <text:p>Bakeet plans to extend its logistics services beyond its own marketplace by leveraging its existing infrastructure to serve merchants who operate outside of the Bakeet platform.</text:p>
            <text:p/>
            <text:p>Practically, this involves:</text:p>
            <text:p/>
            <text:p>* <text:s text:c="2"/>**Expanding the Logistics Infrastructure:** The same logistics network that currently serves Bakeet merchants will be used to support external merchants.</text:p>
            <text:p>* <text:s text:c="2"/>**Future Fulfillment Operations:** The Logistics &amp; Fulfillment Business Unit will manage fulfillment operations that allow merchants to store inventory, prepare orders, and distribute products through a unified operational network, regardless of where the order originated.</text:p>
            <text:p>* <text:s text:c="2"/>**Providing External Services:** The business unit explicitly manages the external delivery service offered to merchants who generate orders outside the Bakeet platform, thereby extending Bakeet’s operational capabilities beyond its own marketplace.</text:p>
          </table:table-cell>
          <table:table-cell office:value-type="string" table:style-name="ce8">
            <text:p>كيف تخطط باكيت لتوسيع خدماتها اللوجستية خارج نطاق سوقها الإلكتروني؟</text:p>
          </table:table-cell>
          <table:table-cell office:value-type="string" table:style-name="ce14">
            <text:p>تخطط باكيت لتوسيع خدماتها اللوجستية خارج نطاق سوقها الإلكتروني من خلال اعتبار البنية التحتية اللوجستية **قدرة استراتيجية** وليست مجرد خدمة داعمة.</text:p>
            <text:p/>
            <text:p>عملياً، يتم ذلك عبر النقاط التالية:</text:p>
            <text:p/>
            <text:p>1. <text:s/>**توحيد الشبكة التشغيلية:** ستستخدم نفس البنية التحتية اللوجستية التي تخدم بائعي باكيت حالياً لخدمة البائعين الذين يعملون خارج منصة باكيت.</text:p>
            <text:p>2. <text:s/>**توفير خدمات التخزين والتحضير:** في المستقبل، ستتمكن باكيت من إدارة عمليات الإيفاء (Fulfillment) للبائعين الخارجيين، مما يتيح لهم تخزين البضائع، تحضير الطلبات، وتوزيع المنتجات عبر شبكة تشغيلية موحدة.</text:p>
            <text:p>3. <text:s/>**ضمان الجودة والاتساق:** ستظل وحدة اللوجستيات مسؤولة عن ضمان أن كل عملية جديدة توفر السرعة، الدقة، الموثوقية، والاتساق، مما يوسع نطاق قدرة باكيت التشغيلية لتشمل خارج حدود سوقها الإلكتروني الخاص.</text:p>
          </table:table-cell>
          <table:table-cell table:number-columns-repeated="16378"/>
        </table:table-row>
        <table:table-row table:style-name="ro2">
          <table:table-cell office:value-type="float" office:value="10" table:style-name="ce12">
            <text:p>10</text:p>
          </table:table-cell>
          <table:table-cell office:value-type="string" table:style-name="ce7">
            <text:p>Business Model &amp; Strategy</text:p>
          </table:table-cell>
          <table:table-cell office:value-type="string" table:style-name="ce7">
            <text:p>Summarize the Bakeet operating philosophy in 3 key principles.</text:p>
          </table:table-cell>
          <table:table-cell office:value-type="string" table:style-name="ce7">
            <text:p>Based on the provided context, Bakeet’s operating philosophy is grounded in three key principles:</text:p>
            <text:p/>
            <text:p>1. <text:s/>**Reduce Complexity:** Every capability, product, and operational decision must simplify the merchant journey and integrate with the ecosystem, never increasing complexity or creating isolated tools.</text:p>
            <text:p>2. <text:s/>**Enable Merchant Growth:** The primary objective is to help merchants grow by removing friction from their operations, allowing them to focus on building their businesses rather than managing operational complexity.</text:p>
            <text:p>3. <text:s/>**Build an Operating System, Not Just Products:** Bakeet aims to be an integrated operating environment rather than a collection of independent services, ensuring that all capabilities work together to create a scalable, aligned organization capable of sustaining operational excellence.</text:p>
          </table:table-cell>
          <table:table-cell office:value-type="string" table:style-name="ce8">
            <text:p>لخّص فلسفة التشغيل في باكيت في ثلاثة مبادئ رئيسية.</text:p>
          </table:table-cell>
          <table:table-cell office:value-type="string" table:style-name="ce14">
            <text:p>بناءً على الوثائق المقدمة، يمكن تلخيص فلسفة التشغيل في باكيت عبر المبادئ الثلاثة التالية:</text:p>
            <text:p/>
            <text:p>1. <text:s/>**تقليل التعقيد:** يجب أن تخدم كل قدرة أو ميزة في النظام مبدأ "تقليل التعقيد" ولا تزيده، وأن تدمج المنتجات الجديدة مع النظام البيئي بدلاً من أن تصبح أدوات معزولة.</text:p>
            <text:p>2. <text:s/>**تمكين التجار (Merchants):** يجب أن تركز العمليات على تحسين تجربة التاجر وتسريع نموه، بحيث يتمكنون من التركيز على بناء أعمالهم بدلاً من إدارة التعقيدات التشغيلية.</text:p>
            <text:p>3. <text:s/>**النمو المتسق وقابلية التوسع:** الهدف هو بناء منظمة قادرة على النمو والتوسع دون فقدان التوافق أو الانسجام الداخلي، حيث يعتمد كل جزء من النظام على الآخر لضمان قياس الأداء ونمو قابل للتنبؤ.</text:p>
          </table:table-cell>
          <table:table-cell table:number-columns-repeated="16378"/>
        </table:table-row>
        <table:table-row table:style-name="ro3">
          <table:table-cell office:value-type="float" office:value="11" table:style-name="ce12">
            <text:p>11</text:p>
          </table:table-cell>
          <table:table-cell office:value-type="string" table:style-name="ce7">
            <text:p>Strengths Analysis</text:p>
          </table:table-cell>
          <table:table-cell office:value-type="string" table:style-name="ce7">
            <text:p>Based on the documents, what are Bakeet's top 5 strategic strengths? Support each with evidence from the text.</text:p>
          </table:table-cell>
          <table:table-cell office:value-type="string" table:style-name="ce7">
            <text:p>Based on the provided documents, Bakeet’s strategic strengths are defined by its clear identity, operational backbone, and disciplined financial foundation. Here are the top 5 strategic strengths supported by evidence from the text:</text:p>
            <text:p/>
            <text:p>1. <text:s/>**Clear Strategic Identity as a Commerce Infrastructure Company**</text:p>
            <text:p><text:s text:c="4"/>Bakeet distinguishes itself from competitors by defining its identity not by specific features, but by its role as infrastructure. This clarity guides all decision-making and prioritization.</text:p>
            <text:p><text:s text:c="4"/>* <text:s text:c="2"/>*Evidence:* "Bakeet is a Commerce Infrastructure Company. That statement defines how we think, It defines how we prioritize. Most importantly, it defines how we make decisions." (Context 3)</text:p>
            <text:p/>
            <text:p>2. <text:s/>**Strong Operational Backbone through Integrated Finance &amp; Administration**</text:p>
            <text:p><text:s text:c="4"/>The company possesses a robust internal structure that supports all business lines, ensuring that every operational decision is backed by financial stability and administrative efficiency.</text:p>
            <text:p><text:s text:c="4"/>* <text:s text:c="2"/>*Evidence:* "Together, these functions create the operational backbone that supports every business line inside Bakeet." (Context 2)</text:p>
            <text:p/>
            <text:p>3. <text:s/>**Financial Discipline and Sustainability**</text:p>
            <text:p><text:s text:c="4"/>Bakeet prioritizes financial health and sustainability over mere growth, ensuring that expansion does not compromise the company's stability. This is managed through a centralized finance unit.</text:p>
            <text:p><text:s text:c="4"/>* <text:s text:c="2"/>*Evidence:* "Growth creates opportunity, financial discipline protects it, as Bakeet expands, every order, every settlement, every investment, and every operational decision must remain financially sustainable." (Context 2)</text:p>
            <text:p/>
            <text:p>4. <text:s/>**Data-Driven Decision Making**</text:p>
            <text:p><text:s text:c="4"/>The organization relies on accurate, trusted financial information to enable confident leadership decisions, ensuring that resources are allocated effectively.</text:p>
            <text:p><text:s text:c="4"/>* <text:s text:c="2"/>*Evidence:* "Finance succeeds when leadership can make confident decisions supported by trusted information." (Context 0)</text:p>
            <text:p/>
            <text:p>5. <text:s/>**Strategic Technology Partnership**</text:p>
            <text:p><text:s text:c="4"/>Technology is recognized as a foundational element of the company, supported by a dedicated strategic partner and defined responsibilities, ensuring that technical capabilities align with business goals.</text:p>
            <text:p><text:s text:c="4"/>* <text:s text:c="2"/>*Evidence:* "Technology is one of the foundations upon which Bakeet is built" and the text outlines specific sections for "Strategic Technology Partner," "Responsibilities," and "Ownership." (Context 0, Context 1)</text:p>
          </table:table-cell>
          <table:table-cell office:value-type="string" table:style-name="ce8">
            <text:p>استناداً إلى الوثائق، ما هي أهم خمس نقاط قوة استراتيجية لدى باكيت؟ ادعم كل نقطة بدليل من النص.</text:p>
          </table:table-cell>
          <table:table-cell office:value-type="string" table:style-name="ce14">
            <text:p>بناءً على الوثائق المقدمة، لا توجد قائمة صريحة بعنوان "أهم خمس نقاط قوة استراتيجية"، ولكن يمكن استخلاص خمس ركائز استراتيجية رئيسية تدعم نموذج عمل "باكيت" من خلال تحليل أقسام الهيكل التنظيمي والمسؤوليات المذكورة في النص. إليك هذه النقاط مدعومة بالأدلة من النص:</text:p>
            <text:p/>
            <text:p>1. **التركيز على البنية التحتية للتجارة بدلاً من كونها مجرد منصة تسوق:**</text:p>
            <text:p><text:s text:c="3"/>* **الدليل:** يشير النص في القسم 3.2 إلى التحول "من السوق الإلكتروني إلى بنية تحتية للتجارة" (From Marketplace to Commerce Infrastructure)، مما يدل على استراتيجية توسع في تقديم الخدمات الأساسية للتجارة وليس فقط الوسيط.</text:p>
            <text:p/>
            <text:p>2. **تنوع خطوط الأعمال الثلاثة الأساسية:**</text:p>
            <text:p><text:s text:c="3"/>* **الدليل:** يحدد النص في القسم 3.3 ثلاثة خطوط أعمال رئيسية تشكل دعائم الشركة: "منصة التجارة" (Commerce Platform)، و"اللوجستيات والتسليم" (Logistics &amp; Fulfillment)، و"وحدة الأعمال للتجارة الاجتماعية" (Social Commerce Business Unit). هذا التنوع يعزز المرونة الشاملة.</text:p>
            <text:p/>
            <text:p>3. **البناء على الثقة قبل المعاملات:**</text:p>
            <text:p><text:s text:c="3"/>* **الدليل:** يذكر النص في القسم 4.5.1 مبدأً استراتيجياً واضحاً وهو "بناء الثقة قبل بناء المعاملات" (Building Trust Before Building Transactions)، مما يشير إلى أن رأس المال الاجتماعي والثقة هو محور استراتيجي في نمو المنصة.</text:p>
            <text:p/>
            <text:p>4. **التميز المالي والإداري كداعم رئيسي للنمو:**</text:p>
            <text:p><text:s text:c="3"/>* **الدليل:** يوضح القسم 4.6 أن وحدة "المالية والإدارة" تمتلك السيطرة على إدارة النقد، والرواتب، والمشتريات، والتميز الإداري. ويذكر في القسم 4.6.4 أن نجاح المالية يعني "بقي تدفق النقد صحياً" و"النمو التنظيمي دون التضحية بالاستقرار المالي"، مما يجعل الكفاءة المالية ركيزة استراتيجية للبقاء والنمو المستدام.</text:p>
            <text:p/>
            <text:p>5. **التكنولوجيا كشريك استراتيجي وأساسي للبناء:**</text:p>
            <text:p><text:s text:c="3"/>* **الدليل:** يذكر النص في القسم 4.7.1 صراحةً أن "التكنولوجيا هي واحدة من الأسس التي تُبنى عليها باكيت" (Technology is one of the foundations upon which Bakeet is built)، وتُعرف بـ "شريكنا الاستراتيجي في التكنولوجيا"، مما يؤكد أن التطور التقني ليس مجرد أداة دعم بل هو محور استراتيجي للعمليات.</text:p>
          </table:table-cell>
          <table:table-cell table:number-columns-repeated="16378"/>
        </table:table-row>
        <table:table-row table:style-name="ro2">
          <table:table-cell office:value-type="float" office:value="12" table:style-name="ce12">
            <text:p>12</text:p>
          </table:table-cell>
          <table:table-cell office:value-type="string" table:style-name="ce7">
            <text:p>Strengths Analysis</text:p>
          </table:table-cell>
          <table:table-cell office:value-type="string" table:style-name="ce7">
            <text:p>What competitive advantages does Bakeet have that "few commerce platforms possess"?</text:p>
          </table:table-cell>
          <table:table-cell office:value-type="string" table:style-name="ce7">
            <text:p>Based on the provided documents, there is no mention of competitive advantages that "few commerce platforms possess." The text describes Bakeet as a "Commerce Infrastructure Company" focused on simplifying commerce by integrating capabilities like delivery, merchant management, payments, and fulfillment into a single ecosystem, but it does not explicitly claim these advantages are unique or possessed by "few" platforms.</text:p>
          </table:table-cell>
          <table:table-cell office:value-type="string" table:style-name="ce8">
            <text:p>ما هي المزايا التنافسية التي تمتلكها باكيت والتي "لا تمتلكها إلا منصات تجارة قليلة"؟</text:p>
          </table:table-cell>
          <table:table-cell office:value-type="string" table:style-name="ce14">
            <text:p>استناداً إلى الوثائق، الميزة التنافسية الفريدة التي تمتلكها باكيت والتي يميزها عن معظم المنافسين (المنصات التقليدية) هي نهجها في **بناء "أنظمة تشغيل" (Operating Systems) للبيئة التجارية، بدلاً من مجرد كونها "منصات" أو "مجموعات خدمات مستقلة"**.</text:p>
            <text:p/>
            <text:p>إليك التفاصيل المدعومة بالأدلة من النص:</text:p>
            <text:p/>
            <text:p>1. **التحول من "منصة" إلى "نظام تشغيل" (Operating System):**</text:p>
            <text:p><text:s text:c="3"/>* **الدليل:** يشير النص في القسم 2.3 إلى أن "معظم الشركات لديها منتجات، وبعضها لديه منصات، ولكن قلائل فقط يبنون أنظمة تشغيل" (very few companies build operating systems). وتؤكد باكيت أنها تنتمي لهذه الفئة الثالثة النادرة، حيث لا تُعد مجرد واجهة للمتاجر، بل هي البنية التحتية التشغيلية التي تدير العمليات المعقدة خلف الكواليس.</text:p>
            <text:p/>
            <text:p>2. **بيئة تشغيل موحدة ومتكاملة (Integrated Operating Environment):**</text:p>
            <text:p><text:s text:c="3"/>* **الدليل:** يذكر النص في القسم 3.2 أن قدرات متعددة مثل "السوق، والتسليم، وإدارة التجار، والدفع، والوفاء، والذكاء الاصطناعي" لا تعمل كخدمات منفصلة، بل تشكل "بيئة تشغيلية موحدة" (one integrated operating environment). هذا التكامل يزيل الحاجة للتجار لإدارة عمليات متفرقة، مما يوفر لهم البساطة والثقة، وهي ميزة نادرة في الأسواق حيث تعمل هذه الخدمات بشكل مجزأ.</text:p>
            <text:p/>
            <text:p>3. **التركيز على حل المشكلات بدلاً من بيع المنتجات:**</text:p>
            <text:p><text:s text:c="3"/>* **الدليل:** في القسم 3.2، يُنص صراحةً على أن "العديد من المنظمات تعرف نفسها بالمنتجات التي تبيعها، بينما تعرف باكيت نفسها بالمشكلات التي تحلها". هذا النهج الاستراتيجي يجعلها بنية تحتية للتجارة (Commerce Infrastructure) تدعم نمو التجار بدلاً من مجرد كونها قناة بيع.</text:p>
            <text:p/>
            <text:p>4. **البنية التحتية غير المرئية ولكن الأساسية:**</text:p>
            <text:p><text:s text:c="3"/>* **الدليل:** يصف النص باكيت في القسم 2.3 و3.2 بأنها "بنية تحتية للتجارة"، مقارنةً ببنية المدينة التحتية التي نادراً ما تكون مرئية لكنها ضرورية للنمو. هذه الرؤية الاستراتيجية تجعلها شريكاً استراتيجياً للتجار في بناء مستقبلهم التجاري، وليس مجرد وسيط.</text:p>
            <text:p/>
            <text:p>باختصار، الميزة التنافسية ليست في ميزة تقنية واحدة، بل في **النموذج الهيكلي والاستراتيجي** الذي يجعل باكيت "نظام تشغيل تجاري متكامل" يحل مشاكل متعددة للتجار في مكان واحد، وهو نموذج يتبعه عدد قليل جداً من الشركات في العالم.</text:p>
          </table:table-cell>
          <table:table-cell table:number-columns-repeated="16378"/>
        </table:table-row>
        <table:table-row table:style-name="ro4">
          <table:table-cell office:value-type="float" office:value="13" table:style-name="ce12">
            <text:p>13</text:p>
          </table:table-cell>
          <table:table-cell office:value-type="string" table:style-name="ce7">
            <text:p>Strengths Analysis</text:p>
          </table:table-cell>
          <table:table-cell office:value-type="string" table:style-name="ce7">
            <text:p>How does the integration between the Commerce Platform, Logistics &amp; Fulfillment, and Social Commerce create value that competitors with separate services cannot match?</text:p>
          </table:table-cell>
          <table:table-cell office:value-type="string" table:style-name="ce7">
            <text:p>Based on the provided documents, the integration between these business lines creates value by transforming digital transactions into seamless real-world experiences and extending infrastructure value, which creates a cohesive ecosystem rather than disjointed services. However, the text **does not** explicitly state that competitors with separate services cannot match this, nor does it compare Bakeet’s capabilities directly against competitors to claim a unique unmatched advantage.</text:p>
            <text:p/>
            <text:p>Here is the value created by the integration as described in the text:</text:p>
            <text:p/>
            <text:p>1. <text:s/>**Seamless Transformation of Digital to Physical:** The Commerce Platform enables transactions, while Logistics &amp; Fulfillment ensures the promise is delivered. The text states that Logistics &amp; Fulfillment is the "execution engine" that transforms "digital transactions into real-world customer experiences," ensuring that every promise made through the platform is successfully delivered.</text:p>
            <text:p>2. <text:s/>**Extended Infrastructure Value:** The Logistics &amp; Fulfillment business line extends value beyond the platform itself by providing logistics services for merchants selling outside the Bakeet marketplace, thereby growing the utility of the infrastructure.</text:p>
            <text:p>3. <text:s/>**Unified Operational Journey:** The Commerce Platform manages the customer and merchant experience, while Logistics manages the complete operational journey of an order. This integration ensures that "commerce does not end when an order is placed," but rather begins there, with a coordinated chain of activities (pickup, assembly, delivery) that determines customer retention.</text:p>
            <text:p/>
            <text:p>The documents do not provide evidence that competitors with separate services cannot match this, only that Bakeet’s model integrates these functions to support its identity as a Commerce Infrastructure Company.</text:p>
          </table:table-cell>
          <table:table-cell office:value-type="string" table:style-name="ce8">
            <text:p>كيف يخلق التكامل بين منصة التجارة، والخدمات اللوجستية، ووحدة التجارة الاجتماعية قيمة لا يستطيع المنافسون ذوو الخدمات المنفصلة مجاراتها؟</text:p>
          </table:table-cell>
          <table:table-cell office:value-type="string" table:style-name="ce14">
            <text:p>يخلق التكامل بين هذه الوحدات قيمة فريدة للمنافسين الذين يعملون بخدمات منفصلة من خلال تحويل العمليات المعقدة إلى تجربة موحدة وبسيطة، وذلك عبر النقاط التالية المدعومة بالنص:</text:p>
            <text:p/>
            <text:p>1. **توفير "بنية تحتية موحدة" بدلاً من خدمات متفرقة:**</text:p>
            <text:p><text:s text:c="3"/>* **الدليل:** يذكر النص في القسم 3.2 أن القدرات المختلفة (مثل السوق، والتسليم، والوفاء) لا تعمل كخدمات مستقلة، بل تشكل "بيئة تشغيلية موحدة" (one integrated operating environment). هذا يعني أن التاجر لا يحتاج للتنسيق بين عدة مقدمي خدمات، مما يقلل التعقيد ويزيد الكفاءة، وهو ما لا يمكن للمنافسين ذوي الخدمات المنفصلة تقديمه بسهولة.</text:p>
            <text:p/>
            <text:p>2. **تعزيز تجربة التاجر والعميل عبر دورة حياة التجارة الكاملة:**</text:p>
            <text:p><text:s text:c="3"/>* **الدليل:** في القسم 3.3، يوضح النص أن خطوط الأعمال الثلاثة (منصة التجارة، واللوجستيات، والتجارة الاجتماعية) تعمل معاً لإنشاء "تجربة عميل وتاجر موحدة". منصة التجارة هي الأساس الرقمي، واللوجستيات تحوّل المعاملات الرقمية إلى تجارب حقيقية، والتجارة الاجتماعية توسع نطاق البيع عبر قنوات جديدة. هذا التكامل يغطي كل مرحلة من رحلة التاجر التجارية، مما يوفر دعماً شاملاً يصعب على المنافسين الذين يركزون على جزء واحد فقط محاكاته.</text:p>
            <text:p/>
            <text:p>3. **تمكين التوسع والإنتاجية من خلال البنية التحتية المشتركة:**</text:p>
            <text:p><text:s text:c="3"/>* **الدليل:** يشير القسم 3.3.2 إلى أن وحدة اللوجستيات لا تخدم فقط التاجر داخل السوق، بل ستقدم خدمات لوجستية للتجار الذين يبيعون خارج منصة باكيت، مما "يوسع قيمة البنية التحتية". هذا يعني أن التاجر يستفيد من كفاءة البنية التحتية المشتركة بغض النظر عن قناة البيع، مما يخلق مرونة وقيمة إضافية غير موجودة في نماذج الخدمات المنفصلة المحدودة النطاق.</text:p>
            <text:p/>
            <text:p>4. **تبسيط التجارة كهدف استراتيجي أساسي:**</text:p>
            <text:p><text:s text:c="3"/>* **الدليل:** يؤكد النص في القسم 3.2 أن "كل قدرة داخل باكيت موجودة لسبب واحد: تبسيط التجارة. كل شيء آخر ثانوي". هذا التركيز على التبسيط من خلال التكامل العميق بين العمليات (مثل الربط بين الطلب، والتخزين، والتسليم، والدفع) يقلل الاحتكاك ويسرع النمو، وهو ما يتطلب تنسيقاً دقيقاً يصعب تحقيقه في بيئات الخدمات المنفصلة.</text:p>
          </table:table-cell>
          <table:table-cell table:number-columns-repeated="16378"/>
        </table:table-row>
        <table:table-row table:style-name="ro3">
          <table:table-cell office:value-type="float" office:value="14" table:style-name="ce12">
            <text:p>14</text:p>
          </table:table-cell>
          <table:table-cell office:value-type="string" table:style-name="ce7">
            <text:p>Strengths Analysis</text:p>
          </table:table-cell>
          <table:table-cell office:value-type="string" table:style-name="ce7">
            <text:p>What organizational strengths does the Bakeet Operating System document reveal about how the company is governed?</text:p>
          </table:table-cell>
          <table:table-cell office:value-type="string" table:style-name="ce7">
            <text:p>Based on the provided documents, the Bakeet Operating System reveals the following organizational strengths regarding governance:</text:p>
            <text:p/>
            <text:p>1. <text:s/>**Living Institutional Memory:** The governance structure is treated as a dynamic, evolving entity rather than static documentation. It serves as the "institutional memory of Bakeet," ensuring that major strategic decisions, organizational changes, and new capabilities are consistently reflected, allowing the organization to maintain clarity and consistency as it grows.</text:p>
            <text:p><text:s text:c="4"/>* <text:s text:c="2"/>*Evidence:* "It is not simply documentation, it is the institutional memory of Bakeet... Every major strategic decision, organizational change, new business capability, or operational process should be reflected within this operating system." (Context 2)</text:p>
            <text:p/>
            <text:p>2. <text:s/>**Unified Alignment and Clarity:** The system ensures that leadership, employees, and partners are aligned around a single operating model. This prevents fragmentation and ensures that growth is supported by "consistency, discipline, and clarity."</text:p>
            <text:p><text:s text:c="4"/>* <text:s text:c="2"/>*Evidence:* "The Bakeet Operating System exists to ensure that the organization grows with consistency, discipline, and clarity, it provides one shared reference that aligns leadership, employees, partners, and future business units around a common operating model." (Context 2)</text:p>
            <text:p/>
            <text:p>3. <text:s/>**Defined Decision Ownership and Responsibility:** Governance is strengthened by clearly defining how responsibilities are distributed and who owns specific decisions. This prevents ambiguity and ensures that success is measurable and predictable.</text:p>
            <text:p><text:s text:c="4"/>* <text:s text:c="2"/>*Evidence:* "This document is the official operating reference for Bakeet, It describes... the responsibilities of each business unit... Decision ownership... Performance measurement." (Context 1)</text:p>
            <text:p/>
            <text:p>4. <text:s/>**Strategic Focus on Future Operations:** The governance framework is designed to establish how the company *will* operate in the future, rather than just documenting current states. This forward-looking approach ensures that the organization is structured for long-term sustainability and strategic evolution.</text:p>
            <text:p><text:s text:c="4"/>* <text:s text:c="2"/>*Evidence:* "Rather than documenting what Bakeet does today, this document establishes how Bakeet will continue to operate in the future." (Context 1)</text:p>
          </table:table-cell>
          <table:table-cell office:value-type="string" table:style-name="ce8">
            <text:p>ما نقاط القوة التنظيمية التي تكشفها وثيقة نظام التشغيل في باكيت حول طريقة حوكمة الشركة؟</text:p>
          </table:table-cell>
          <table:table-cell office:value-type="string" table:style-name="ce14">
            <text:p>استناداً إلى وثيقة "نظام التشغيل" (The Bakeet Operating System) المقدمة في السياق، تكشف الوثيقة عن نقاط قوة تنظيمية في حوكمة الشركة تتمحور حول **الوضوح، المركزية الاستراتيجية، والمرونة التشغيلية**. إليك أهم هذه النقاط مدعومة بالأدلة:</text:p>
            <text:p/>
            <text:p>1. **نظام حوكمة موحد وواضح (One Operating System):**</text:p>
            <text:p><text:s text:c="3"/>* **الدليل:** يوضح النص في القسم 3.4 و4 أن باكيت تتبع نموذج "شركة واحدة، نظام تشغيل واحد". هذا يعني أن الحوكمة ليست موزعة بشكل فوضوي بين الأقسام، بل هناك مرجع رسمي موحد يحدد الفلسفة، ونموذج التشغيل، وتوزيع المسؤوليات، ومعايير قياس النجاح. هذا الوضوح يقلل من الغموض في اتخاذ القرار ويوحد الرؤية بين القيادة والموظفين والشركاء.</text:p>
            <text:p/>
            <text:p>2. **تمديد الملكية الواضحة للقرارات (Decision Ownership):**</text:p>
            <text:p><text:s text:c="3"/>* **الدليل:** يذكر النص في القسم "What This Document Is" أن الوثيقة تحدد "ملكية القرار" (Decision ownership). هذا يشير إلى حوكمة قوية حيث تكون المسؤوليات مفصلة بوضوح لكل وحدة أعمال، مما يمنع التداخل في الصلاحيات ويضمن مساءلة واضحة عند اتخاذ القرارات الاستراتيجية أو التشغيلية.</text:p>
            <text:p/>
            <text:p>3. **مرونة تكيفية و"وثيقة حية" (Living Document):**</text:p>
            <text:p><text:s text:c="3"/>* **الدليل:** في القسم 1 و2، يصف النص النظام التشغيلي بأنه "وثيقة حية" (living document) تتطور مع تطور الشركة. تستراتيجياً، هذا يشير إلى حوكمة ديناميكية لا تتشبث بالإجراءات القديمة، بل تسمح بتحديث الهيكل التنظيمي والمسؤوليات استجابةً للتغيرات الاستراتيجية الجديدة، مما يعزز قدرة الشركة على الاستجابة السريعة للتحديات والفرص.</text:p>
            <text:p/>
            <text:p>4. **استقلالية الوحدات مع تكامل استراتيجي:**</text:p>
            <text:p><text:s text:c="3"/>* **الدليل:** يشير السياق (مثل ذكر "وحدات الأعمال" في القسم 4.1 و"الخدمات المشتركة" في مقدمة القسم 1) إلى هيكلية تعترف باستقلال كل وحدة أعمال (مثل المكتب الرئيسي، ومنصة التجارة، واللوجستيات) مع وجود خدمات مشتركة تدعمها. هذا النموذج يسمح لكل وحدة بالتركيز على هدفها الاستراتيجي الخاص مع الحفاظ على تماسك الشركة ككل عبر الخدمات الاستراتيجية الموحدة، وهو ما يعزز الكفاءة والابتكار داخل كل قسم.</text:p>
            <text:p/>
            <text:p>5. **التركيز على القياس والأداء (Performance Measurement):**</text:p>
            <text:p><text:s text:c="3"/>* **الدليل:** يحدد النص أن الوثيقة تغطي "قياس الأداء" (Performance measurement) ومبادئ الحوكمة. هذا يشير إلى أن الحوكمة في باكيت ليست مجرد هيكل صلاحيات، بل هي نظام موجه نحو النتائج، حيث يتم تقييم نجاح الوحدات والأفراد بناءً على معايير واضحة ومحددة مسبقاً، مما يضمن المساءلة والشفافية في الأداء.</text:p>
            <text:p/>
            <text:p>باختصار، نقاط القوة في حوكمة باكيت تكمن في **التوازن بين الوضوح التنظيمي الصارم (من خلال نظام تشغيل موحد ومحدد المسؤوليات) والمرونة الاستراتيجية (من خلال كون الوثيقة حية وقابلة للتطور)**، مما يخلق بيئة عمل منظمة ولكنها قادرة على النمو والتكيف.</text:p>
          </table:table-cell>
          <table:table-cell table:number-columns-repeated="16378"/>
        </table:table-row>
        <table:table-row table:style-name="ro3">
          <table:table-cell office:value-type="float" office:value="15" table:style-name="ce12">
            <text:p>15</text:p>
          </table:table-cell>
          <table:table-cell office:value-type="string" table:style-name="ce7">
            <text:p>Weaknesses &amp; Gaps</text:p>
          </table:table-cell>
          <table:table-cell office:value-type="string" table:style-name="ce7">
            <text:p>Based on the documents, what are the main weaknesses or gaps in Bakeet's current operating model?</text:p>
          </table:table-cell>
          <table:table-cell office:value-type="string" table:style-name="ce7">
            <text:p>Based on the provided documents, there are no explicit weaknesses or gaps listed in Bakeet's *current* operating model. Instead, the documents describe Bakeet's operating model as a future-oriented structure ("The Bakeet Operating System") designed to solve existing industry problems.</text:p>
            <text:p/>
            <text:p>However, the documents do identify **problems in the current market/merchant experience** that Bakeet aims to address:</text:p>
            <text:p/>
            <text:p>1. <text:s/>**Disconnected Capabilities:** When capabilities are disconnected, merchants spend their time managing operations instead of growing their business.</text:p>
            <text:p>2. <text:s/>**Merchant Burden:** Merchants currently face complexity, whereas Bakeet aims to provide simplicity and confidence.</text:p>
            <text:p>3. <text:s/>**Lack of Integrated Ecosystem:** The documents suggest that sustainable commerce requires more than just technology (like another marketplace or mobile app); it requires an integrated operating system that connects people, processes, services, and data.</text:p>
            <text:p/>
            <text:p>In short, the "gaps" are not in Bakeet's model itself (which is presented as the solution), but in the traditional approach to commerce that Bakeet is replacing.</text:p>
          </table:table-cell>
          <table:table-cell office:value-type="string" table:style-name="ce8">
            <text:p>استناداً إلى الوثائق، ما هي أبرز نقاط الضعف أو الفجوات في نموذج التشغيل الحالي لباكيت؟</text:p>
          </table:table-cell>
          <table:table-cell office:value-type="string" table:style-name="ce14">
            <text:p>استناداً إلى الوثائق المقدمة، لا تذكر الوثائق نقاط ضعف أو فجوات في نموذج التشغيل **الحالي** لباكيت، بل تصف نموذج التشغيل كمنصة مستقبلية أو مؤسّسة قيد البناء. ومع ذلك، تشير الوثائق إلى **التحديات أو المشاكل التي يواجهها التجار حالياً** بسبب عدم وجود نظام تشغيل متكامل، والتي يسعى باكيت لحلها:</text:p>
            <text:p/>
            <text:p>1. **تجزئة القدرات التشغيلية**: عندما تكون القدرات (مثل الأداء، النمو، العمليات) منفصلة وغير متصلة، فإن التجار يضيعون وقتهم في إدارة العمليات بدلاً من التركيز على نمو أعمالهم.</text:p>
            <text:p>2. **تعقيد العمليات**: في غياب النظام المتكامل، يواجه التجار صعوبة في البساطة والثقة التي يوفرها نظام باكيت الموحد.</text:p>
            <text:p>3. **التركيز على الإدارة بدلاً من النمو**: بسبب عدم التكامل، يصبح التركيز على الإدارة اليومية والعمليات بدلاً من الاستراتيجيات طويلة المدى والنمو المستدام.</text:p>
            <text:p/>
            <text:p>باختصار، الفجوة ليست في نظام باكيت نفسه، بل في البيئة التجارية الحالية التي تفتقر إلى نظام تشغيل متكامل يربط بين الناس، العمليات، الخدمات، والبيانات في بيئة واحدة موحدة.</text:p>
          </table:table-cell>
          <table:table-cell table:number-columns-repeated="16378"/>
        </table:table-row>
        <table:table-row table:style-name="ro3">
          <table:table-cell office:value-type="float" office:value="16" table:style-name="ce12">
            <text:p>16</text:p>
          </table:table-cell>
          <table:table-cell office:value-type="string" table:style-name="ce7">
            <text:p>Weaknesses &amp; Gaps</text:p>
          </table:table-cell>
          <table:table-cell office:value-type="string" table:style-name="ce7">
            <text:p>Bakeet outsources technology execution to an external partner (101). What are the potential risks and downsides of this dependency?</text:p>
          </table:table-cell>
          <table:table-cell office:value-type="string" table:style-name="ce7">
            <text:p>Based on the provided documents, there are no explicit risks or downsides listed regarding the dependency on the external partner (101). In fact, the documents frame this relationship as a strategic strength rather than a weakness.</text:p>
            <text:p/>
            <text:p>The documents highlight the following points that mitigate potential risks:</text:p>
            <text:p/>
            <text:p>* <text:s text:c="2"/>**Clear Separation of Concerns:** Bakeet intentionally separates technology execution from business ownership. This allows Bakeet to focus on its core competencies (product, customer, operational model) while 101 focuses on technical excellence.</text:p>
            <text:p>* <text:s text:c="2"/>**Strategic Partnership:** 101 is described as a "strategic technology partner" that participates in the continuous evolution of the Bakeet ecosystem, not just a vendor. They contribute engineering expertise, architectural guidance, and technical innovation.</text:p>
            <text:p>* <text:s text:c="2"/>**Shared Vision:** While 101 owns technology delivery and architecture, product strategy is shared with Bakeet. This ensures that technological decisions support long-term scalability and align with business needs.</text:p>
            <text:p>* <text:s text:c="2"/>**Success Metrics:** The model is designed to make technology an "invisible competitive advantage," implying that the partnership aims for high reliability, predictability, and performance, which reduces operational risk for Bakeet.</text:p>
            <text:p/>
            <text:p>The documents do not discuss potential downsides such as loss of internal technical knowledge, communication delays, or vendor lock-in. They present the model as a deliberate choice to enable Bakeet to remain focused on commerce while ensuring technology evolves alongside business needs.</text:p>
          </table:table-cell>
          <table:table-cell office:value-type="string" table:style-name="ce8">
            <text:p>تعتمد باكيت على شريك خارجي (101) في تنفيذ التكنولوجيا. ما المخاطر والسلبيات المحتملة لهذا الاعتماد؟</text:p>
          </table:table-cell>
          <table:table-cell office:value-type="string" table:style-name="ce14">
            <text:p>استناداً إلى الوثائق المقدمة، لا تذكر الوثائق أي مخاطر أو سلبيات صراحةً للتعامل مع الشريك (101). على العكس من ذلك، تصف الوثائق هذا النموذج (الفصل بين امتلاك المنتج/الأعمال وبين التنفيذ التكنولوجي) كـ **ميزة استراتيجية** و**أساس متين** لباكيت، حيث يوضح النص التالي:</text:p>
            <text:p/>
            <text:p>* <text:s text:c="2"/>**الوضوح في الأدوار:** "تحدد الأعمال الرؤية. التكنولوجيا تُمكّن الرؤية." هذا الفصل يسمح لكل كيان بالتركيز على ما يجيده.</text:p>
            <text:p>* <text:s text:c="2"/>**التركيز:** تملك باكيت المنتج والعميل ونموذج التشغيل، بينما يملك 101 التنفيذ التكنولوجي. هذا يمنع تشتت الجهود.</text:p>
            <text:p>* <text:s text:c="2"/>**النتيجة الإيجابية:** يصف القسم 4.7.4 النجاح بأن التكنولوجيا تصبح "ميزة تنافسية خفية" تجعل كل وحدات الأعمال الأخرى تؤدي بأفضل أداء، وتصبح الإصدارات قابلة للتنبؤ، والأداء مستقراً.</text:p>
            <text:p/>
            <text:p>لذلك، بناءً على النص المقدم فقط، **لا توجد مخاطر أو سلبيات مذكورة**. بل يتم تقديم الشراكة مع 101 كحل مثالي لضمان الجودة، الموثوقية، والتوسع طويل المدى.</text:p>
          </table:table-cell>
          <table:table-cell table:number-columns-repeated="16378"/>
        </table:table-row>
        <table:table-row table:style-name="ro3">
          <table:table-cell office:value-type="float" office:value="17" table:style-name="ce12">
            <text:p>17</text:p>
          </table:table-cell>
          <table:table-cell office:value-type="string" table:style-name="ce7">
            <text:p>Weaknesses &amp; Gaps</text:p>
          </table:table-cell>
          <table:table-cell office:value-type="string" table:style-name="ce7">
            <text:p>What critical business functions or capabilities are NOT clearly addressed in the Bakeet Operating System document?</text:p>
          </table:table-cell>
          <table:table-cell office:value-type="string" table:style-name="ce7">
            <text:p>Based on the provided documents, the following critical business functions or capabilities are **not clearly addressed**:</text:p>
            <text:p/>
            <text:p>1. <text:s/>**Specific Business Units:** While Chapter 4 mentions that business units exist to own critical capabilities, the documents do not list or define what those specific units are (e.g., Marketing, Sales, HR, Finance, Customer Support).</text:p>
            <text:p>2. <text:s/>**Detailed Technical Architecture:** The documents mention that technology is part of the operating model and that 101 is the technical partner, but they do not detail the specific tech stack, infrastructure, or software architecture.</text:p>
            <text:p>3. <text:s/>**Financial Models and Metrics:** There is no mention of specific revenue models, pricing strategies, profit margins, or detailed financial KPIs beyond the general concept that "performance must be measured" and "growth must be predictable."</text:p>
            <text:p>4. <text:s/>**Human Resources and Talent Strategy:** The documents discuss "people" as part of the operating model but do not address hiring, retention, culture, compensation, or organizational structure details beyond the concept of "business units."</text:p>
            <text:p>5. <text:s/>**Legal and Compliance Frameworks:** There is no mention of regulatory compliance, data privacy laws, contracts, or legal risk management.</text:p>
            <text:p>6. <text:s/>**Customer Acquisition and Marketing Strategies:** While "simplicity" and "customer experience" are mentioned, specific marketing channels, customer acquisition costs (CAC), or growth hacking strategies are not detailed.</text:p>
            <text:p>7. <text:s/>**Supply Chain and Logistics:** For a commerce platform, logistics and supply chain management are critical, but the documents do not address how these are handled within the operating model.</text:p>
            <text:p>8. <text:s/>**Product Roadmap:** There is no specific timeline, feature list, or product development roadmap provided.</text:p>
            <text:p>9. <text:s/>**Competitive Analysis:** The documents do not discuss competitors or market positioning relative to other players.</text:p>
            <text:p>10. **Risk Management:** While "risk" is implied in the need for stability, there is no explicit risk management framework or contingency planning detailed.</text:p>
            <text:p/>
            <text:p>In essence, the documents provide a **high-level philosophical and structural framework** for the Bakeet Operating System, focusing on alignment, purpose, and the separation of technology execution from business ownership, but they omit the **operational details** of how the business actually runs day-to-day.</text:p>
          </table:table-cell>
          <table:table-cell office:value-type="string" table:style-name="ce8">
            <text:p>ما الوظائف أو القدرات الحيوية التي لم يتم تناولها بوضوح في وثيقة نظام التشغيل الخاص بباكيت؟</text:p>
          </table:table-cell>
          <table:table-cell office:value-type="string" table:style-name="ce14">
            <text:p>استناداً إلى الوثائق المقدمة، لا توضح الوثائق بشكل صريح قائمة بـ "الفجوات" أو الوظائف المفقودة. ومع ذلك، يمكن استنتاج ما يلي من خلال تحليل ما تم ذكره وما تم تجاهله:</text:p>
            <text:p/>
            <text:p>1. <text:s/>**التركيز على "نظام التشغيل" وليس "الهيكل الوظيفي التفصيلي":** الوثيقة تتحدث عن فلسفة العمل، والبنية الاستراتيجية، وقيمة العملاء (البساطة، الثقة)، وليس عن أقسام الموارد البشرية، أو المالية، أو الدعم الفني التفصيلية كوظائف منفصلة.</text:p>
            <text:p>2. <text:s/>**ذكر القدرات كـ "مكونات" وليس كـ "وظائف تنفيذية":** تم ذكر أن "التسويق"، "التوصيل"، "إدارة التجار"، "المدفوعات"، و "الذكاء الاصطناعي" هي قدرات تشكل البيئة التشغيلية المتكاملة، لكن لم يتم تحديد الوظائف البشرية أو الإدارية المحددة التي تدير هذه القدرات داخل الهيكل الحالي.</text:p>
            <text:p>3. <text:s/>**غياب تفاصيل حول الوظائف الداعمة (Support Functions):** لا توجد إشارة واضحة في النصوص المقطعة إلى وظائف مثل: الامتثال القانوني، الأمن السيبراني (بخلاف البنية التحتية)، أو إدارة سلسلة التوريد المباشرة (بخلاف كونها قدرة)، أو التوظيف والتطوير الوظيفي.</text:p>
            <text:p/>
            <text:p>**باختصار:** الوثيقة تتجاهل **الوظائف الإدارية والعملياتية الداعمة** (مثل الموارد البشرية، المالية، القانونية، والأمن) لأنها تركز على **القدرات التجارية والتكنولوجية الأساسية** التي تلامس العميل والتاجر مباشرة، وتعتبر الأنظمة الداخلية جزءاً من "البنية التحتية غير المرئية" أو "الذاكرة المؤسسية" دون تفصيلها كوظائف منفصلة في هذا المستند التأسيسي.</text:p>
          </table:table-cell>
          <table:table-cell table:number-columns-repeated="16378"/>
        </table:table-row>
        <table:table-row table:style-name="ro3">
          <table:table-cell office:value-type="float" office:value="18" table:style-name="ce12">
            <text:p>18</text:p>
          </table:table-cell>
          <table:table-cell office:value-type="string" table:style-name="ce7">
            <text:p>Weaknesses &amp; Gaps</text:p>
          </table:table-cell>
          <table:table-cell office:value-type="string" table:style-name="ce7">
            <text:p>Is there a potential conflict of interest in Bakeet acting as both a marketplace operator and a merchant (through Social Commerce)? Explain.</text:p>
          </table:table-cell>
          <table:table-cell office:value-type="string" table:style-name="ce7">
            <text:p>Based on the provided documents, there is **no indication of a conflict of interest** that would harm the platform or other merchants. In fact, the documents explicitly frame this dual role as a strategic advantage and a core component of the operating model.</text:p>
            <text:p/>
            <text:p>Here is the explanation based on the text:</text:p>
            <text:p/>
            <text:p>1. <text:s/>**Purpose of Social Commerce:** The Social Commerce Business Unit is not just another revenue stream; it is described as an **"innovation engine"** and a **"living laboratory."** Its primary objective is to validate assumptions, identify operational inefficiencies, and develop solutions *before* they are introduced to the wider merchant community.</text:p>
            <text:p>2. <text:s/>**Benefit to Merchants:** By operating its own brands, Bakeet tests its own tools and processes. The documents state: **"Bakeet does not simply build tools for merchants, Bakeet uses them every day."** This ensures that the infrastructure and services provided to independent merchants are proven, efficient, and effective because they have been stress-tested by Bakeet itself.</text:p>
            <text:p>3. <text:s/>**Alignment of Interests:** The document suggests that this model creates an advantage that few commerce platforms possess. Instead of a conflict where the platform might favor its own products over third-party ones, the internal use of the platform is framed as a quality assurance and improvement mechanism for *all* merchants.</text:p>
            <text:p>4. <text:s/>**Clear Separation of Roles:** The documents distinguish between the **Marketplace** (where independent merchants sell) and the **Social Commerce Business Unit** (which operates Bakeet-owned brands). This structural separation helps clarify responsibilities and ownership.</text:p>
            <text:p/>
            <text:p>Therefore, according to the provided text, the dual role is designed to **strengthen** the ecosystem by ensuring that the platform's tools and services are robust and reliable for all users, rather than creating a conflict of interest.</text:p>
          </table:table-cell>
          <table:table-cell office:value-type="string" table:style-name="ce8">
            <text:p>هل هناك تضارب مصالح محتمل في كون باكيت مشغّلاً للسوق وتاجراً في الوقت نفسه (من خلال التجارة الاجتماعية)؟ اشرح ذلك.</text:p>
          </table:table-cell>
          <table:table-cell office:value-type="string" table:style-name="ce14">
            <text:p>استناداً إلى الوثائق المقدمة، **لا يوجد تضارب مصالح** يُذكر، بل على العكس، تصف الوثائق هذا الوضع كـ **ميزة استراتيجية أساسية** وجزء جوهري من فلسفة "نظام التشغيل" الخاص بباكيت.</text:p>
            <text:p/>
            <text:p>إليك الشرح بناءً على النصوص:</text:p>
            <text:p/>
            <text:p>1. <text:s/>**مختبر حي (Living Laboratory):**</text:p>
            <text:p><text:s text:c="4"/>تذكر الوثائق أن كون باكيت تاجراً أيضاً يسمح لها بـ "اختبار الافتراضات بشكل مستمر، وتحديد inefficiencies التشغيلية، وتطوير الحلول قبل تقديمها للمجتمع التجاري الأوسع" (Context 0). هذا يعني أن باكيت تستخدم تجربتها التجارية الحقيقية لتحسين أدواتها ومنصتها، مما يعطيها ميزة تنافسية لا تمتلكها منصات التجارة الأخرى التي تبني الأدوات فقط دون استخدامها.</text:p>
            <text:p/>
            <text:p>2. <text:s/>**فهم التحديات عن قرب:**</text:p>
            <text:p><text:s text:c="4"/>تنص الوثائق على أن أحد أكثر الطرق فعالية لبناء منتجات أفضل هو "تجربة نفس التحديات التي يواجهها الناس الذين صُممت من أجلهم المنتجات" (Context 2). من خلال التشغيل المباشر (التوريد، المخزون، التسويق، خدمة العملاء)، تتعلم باكيت دروساً عملية تجعل منتجاتها وخدماتها أكثر قوة وملاءمة للتجار.</text:p>
            <text:p/>
            <text:p>3. <text:s/>**التركيز على تحسين النظام ككل:**</text:p>
            <text:p><text:s text:c="4"/>الهدف من وحدة التجارة الاجتماعية ليس فقط الربح، بل هو "محرك ابتكار" (Innovation Engine) داخل نظام التشغيل. كل تجربة وحملة وتحسين تشغيلي تولد معرفة تقوي النظام البيئي بأكمله، مما يفيد آلاف التجار (Context 0, Context 1).</text:p>
            <text:p/>
            <text:p>4. <text:s/>**الشفافية والهدف:**</text:p>
            <text:p><text:s text:c="4"/>لا يُصوَّر هذا النشاط كتضارب، بل كجزء من "المسؤوليات" التي تدير دورة حياة المنتجات المملوكة لباكيت، وكل نشاط يؤدي إلى تحسين مستمر للمنتجات والخدمات المقدمة للتجار (Context 3).</text:p>
            <text:p/>
            <text:p>**الخلاصة:**</text:p>
            <text:p>وفقاً للوثائق، لا يُنظر إلى كون باكيت تاجراً ومشغّلاً للسوق في آن واحد على أنه تضارب مصالح، بل كـ **استراتيجية تكامل عميق** تهدف إلى تحسين جودة المنصة، وتقليل الفجوة بين النظرية والتطبيق، وخلق قيمة مضافة للتجار من خلال تجربة عملية حية.</text:p>
          </table:table-cell>
          <table:table-cell table:number-columns-repeated="16378"/>
        </table:table-row>
        <table:table-row table:style-name="ro3">
          <table:table-cell office:value-type="float" office:value="19" table:style-name="ce12">
            <text:p>19</text:p>
          </table:table-cell>
          <table:table-cell office:value-type="string" table:style-name="ce7">
            <text:p>Weaknesses &amp; Gaps</text:p>
          </table:table-cell>
          <table:table-cell office:value-type="string" table:style-name="ce7">
            <text:p>The document mentions many "future" capabilities (fulfillment, payments, AI). What execution risks come with this broad ambition?</text:p>
          </table:table-cell>
          <table:table-cell office:value-type="string" table:style-name="ce7">
            <text:p>Based on the provided documents, there are no explicit execution risks or downsides listed regarding the broad ambition of future capabilities like fulfillment, payments, and AI. Instead, the documents emphasize **strategic safeguards** designed to manage this expansion:</text:p>
            <text:p/>
            <text:p>1. <text:s/>**Financial Discipline:** The document states that "financial discipline protects it [opportunity]" and that every operational decision must remain "financially sustainable." This implies a guardrail against uncontrolled spending on future capabilities.</text:p>
            <text:p>2. <text:s/>**Core Focus:** The documents stress that Bakeet is building "the infrastructure that enables modern commerce," not just a marketplace. This suggests that future capabilities (like fulfillment or AI) are viewed as essential parts of that infrastructure, not distractions.</text:p>
            <text:p>3. <text:s/>**Scalability over Convenience:** The technology section notes that "every technical decision should support long-term scalability rather than short-term convenience." This prioritizes sustainable growth over rapid, potentially fragile, feature deployment.</text:p>
            <text:p>4. <text:s/>**Measured Success:** Success is measured by "the number of obstacles we remove from the merchant's journey," not just by releasing new features. This ensures that new capabilities (like AI) are driven by actual merchant needs and value, rather than technological novelty.</text:p>
            <text:p/>
            <text:p>The documents do not discuss potential risks such as:</text:p>
            <text:p>* <text:s text:c="2"/>**Resource Dilution:** Spreading teams too thin across many future initiatives.</text:p>
            <text:p>* <text:s text:c="2"/>**Complexity:** The operational complexity of managing fulfillment, payments, and AI simultaneously.</text:p>
            <text:p>* <text:s text:c="2"/>**Execution Failure:** The risk of failing to deliver these complex capabilities on time or within budget.</text:p>
            <text:p>* <text:s text:c="2"/>**Market Timing:** The risk of launching capabilities before the market is ready.</text:p>
            <text:p/>
            <text:p>In summary, the documents present the broad ambition as a calculated strategy supported by financial discipline, scalability-focused technology decisions, and a merchant-centric value metric, rather than highlighting the inherent risks of such an expansion.</text:p>
          </table:table-cell>
          <table:table-cell office:value-type="string" table:style-name="ce8">
            <text:p>تذكر الوثيقة العديد من القدرات "المستقبلية" (التخزين والتنفيذ، المدفوعات، الذكاء الاصطناعي). ما مخاطر التنفيذ المرتبطة بهذا الطموح الواسع؟</text:p>
          </table:table-cell>
          <table:table-cell office:value-type="string" table:style-name="ce14">
            <text:p>استناداً إلى الوثائق المقدمة، لا تذكر الوثائق صراحةً "مخاطر" أو "سلبيات" مرتبطة بتنفيذ هذه القدرات المستقبلية (مثل التخزين، المدفوعات، والذكاء الاصطناعي). على العكس من ذلك، تصف الوثائق هذه القدرات كـ **أعمدة أساسية** لنظام التشغيل المتكامل الذي يهدف إلى تبسيط حياة التجار.</text:p>
            <text:p/>
            <text:p>ومع ذلك، يمكن استنتاج بعض **التحديات أو المتطلبات الحرجة** التي إذا لم تُدار بشكل صحيح، قد تهدد نجاح هذه القدرات، وذلك من خلال ما ورد في النصوص:</text:p>
            <text:p/>
            <text:p>1. <text:s/>**تعقيد التكامل (Complexity of Integration):**</text:p>
            <text:p><text:s text:c="4"/>تركز الوثيقة على أن الهدف هو "بيئة واحدة موحدة" (Single Unified Environment). الخطر المحتمل هنا هو فشل الربط السلس بين هذه القدرات. النص يشير إلى أن النجاح يعتمد على جعل "العمليات اليومية... بسيطة وموثوقة" (Context 0). إذا فشلت القدرات المستقبلية في التكامل بسلاسة، فقد تفقد باكيت وعودها بالـ "البساطة" و "الثقة".</text:p>
            <text:p/>
            <text:p>2. <text:s/>**الاعتماد على التكنولوجيا كـ "ميزة تنافسية خفية":**</text:p>
            <text:p><text:s text:c="4"/>في قسم 4.7.4 (Success Looks Like)، يُذكر أن التكنولوجيا يجب أن تصبح "ميزة تنافسية خفية" (Invisible Competitive Advantage). هذا يعني أن أي عطل في هذه القدرات (مثل انقطاع في المدفوعات أو فشل في خوارزميات الذكاء الاصطناعي) لا يُنظر إليه فقط كعقبة تقنية، بل كخلل في "العمود الفقري التشغيلي" الذي يدعم كل وحدات الأعمال. لذلك، فإن توقعات الموثوقية (Reliability) والوفرة العالية (High Availability) مرتفعة جداً، مما يجعل أي عطل أكثر تكلفة وتأثيراً.</text:p>
            <text:p/>
            <text:p>3. <text:s/>**التوازن بين الابتكار والاستقرار المالي:**</text:p>
            <text:p><text:s text:c="4"/>يشير قسم Finance &amp; Administration (Context 1) إلى أن "النمو يخلق فرصاً، والانضباط المالي يحميها". تنفيذ قدرات جديدة مثل الذكاء الاصطناعي والتخزين يتطلب استثمارات كبيرة. الخطر الضمني هو أن يؤدي الطموح الواسع في الابتكار إلى تعريض الاستدامة المالية للخطر إذا لم يتم إدارة هذه الاستثمارات بدقة. النص يؤكد أن "كل قرار تشغيلي يجب أن يكون مستداماً مالياً".</text:p>
            <text:p/>
            <text:p>4. <text:s/>**مخاطر الجودة والموثوقية التقنية:**</text:p>
            <text:p><text:s text:c="4"/>في قسم 4.7.3 (Ownership)، يُذكر أن الشريك التقني (101) يملك مسؤولية "جودة البرمجيات"، "هندسة البنية التحتية"، و "جودة النشر". أي فشل في تحقيق هذه المعايير (مثل إصدارات غير متوقعة أو أداء منخفض) يتعارض مباشرة مع تعريف النجاح في القسم 4.7.4.</text:p>
            <text:p/>
            <text:p>**باختصار:**</text:p>
            <text:p>الوثائق لا تتحدث عن مخاطر فشل القدرات بحد ذاتها، بل عن **مخاطر الفشل في تحقيق التكامل السلس، الموثوقية العالية، والاستدامة المالية** اللازمة لدعم هذه القدرات المتقدمة. النجاح يعتمد على جعل هذه التعقيدات التقنية "غير مرئية" للمستخدم النهائي (التاجر)، مما يتطلب دقة تنفيذ عالية جداً.</text:p>
          </table:table-cell>
          <table:table-cell table:number-columns-repeated="16378"/>
        </table:table-row>
        <table:table-row table:style-name="ro2">
          <table:table-cell office:value-type="float" office:value="20" table:style-name="ce12">
            <text:p>20</text:p>
          </table:table-cell>
          <table:table-cell office:value-type="string" table:style-name="ce7">
            <text:p>Revenue &amp; Commercial Model</text:p>
          </table:table-cell>
          <table:table-cell office:value-type="string" table:style-name="ce7">
            <text:p>Based on the documents, what are Bakeet's current and future revenue streams?</text:p>
          </table:table-cell>
          <table:table-cell office:value-type="string" table:style-name="ce7">
            <text:p>Based on the provided documents, there is no information regarding Bakeet's specific current or future revenue streams. The texts describe the company's operating system, business architecture, and the responsibilities of business units such as Finance and Technology, but they do not detail how the company generates income.</text:p>
          </table:table-cell>
          <table:table-cell office:value-type="string" table:style-name="ce8">
            <text:p>استناداً إلى الوثائق، ما هي مصادر الإيرادات الحالية والمستقبلية لباكيت؟</text:p>
          </table:table-cell>
          <table:table-cell office:value-type="string" table:style-name="ce14">
            <text:p>استناداً إلى الوثائق المقدمة، لا توجد معلومات تحدد مصادر الإيرادات (سواء الحالية أو المستقبلية) لشركة باكيت. تركز الوثائق بشكل أساسي على هيكلية الأقسام الداخلية، وتحديداً وحدة "المالية والإدارة" ومسؤولياتها، ولكن دون ذكر تفاصيل عن نماذج العمل أو مصادر الدخل.</text:p>
          </table:table-cell>
          <table:table-cell table:number-columns-repeated="16378"/>
        </table:table-row>
        <table:table-row table:style-name="ro3">
          <table:table-cell office:value-type="float" office:value="21" table:style-name="ce12">
            <text:p>21</text:p>
          </table:table-cell>
          <table:table-cell office:value-type="string" table:style-name="ce7">
            <text:p>Revenue &amp; Commercial Model</text:p>
          </table:table-cell>
          <table:table-cell office:value-type="string" table:style-name="ce7">
            <text:p>How does the Social Commerce Business Unit contribute commercially, and why is it described as "more than a revenue stream"?</text:p>
          </table:table-cell>
          <table:table-cell office:value-type="string" table:style-name="ce7">
            <text:p>The Social Commerce Business Unit contributes commercially by operating Bakeet-owned commercial brands. Unlike the marketplace model where independent merchants sell to customers, this unit is responsible for sourcing products, managing inventory, producing content, operating social sales channels, and growing Bakeet's own retail businesses.</text:p>
            <text:p/>
            <text:p>It is described as "more than a revenue stream" because it serves as an **innovation engine embedded within the Bakeet Operating System** and a **living laboratory** for the organization. By operating as a merchant itself, Bakeet experiences operational challenges firsthand (such as product sourcing, inventory management, and customer engagement). Every lesson, experiment, and campaign generates knowledge that helps improve the products and services provided to all merchants on the platform. This allows Bakeet to validate assumptions, identify inefficiencies, and develop solutions before introducing them to the wider merchant community, thereby strengthening the entire ecosystem rather than just generating direct profit.</text:p>
          </table:table-cell>
          <table:table-cell office:value-type="string" table:style-name="ce8">
            <text:p>كيف تساهم وحدة التجارة الاجتماعية تجارياً، ولماذا توصف بأنها "أكثر من مجرد مصدر إيرادات"؟</text:p>
          </table:table-cell>
          <table:table-cell office:value-type="string" table:style-name="ce14">
            <text:p>تساهم وحدة التجارة الاجتماعية تجارياً من خلال تشغيل علامات تجارية تجارية مملوكة لشركة باكيت (Bakeet-owned commercial brands). وعلى عكس المنصة التي يعتمد فيها البائعون المستقلون على العملاء، تتولى هذه الوحدة مسؤوليات تشمل:</text:p>
            <text:p/>
            <text:p>* <text:s text:c="2"/>توفير المنتجات (Sourcing).</text:p>
            <text:p>* <text:s text:c="2"/>إدارة المخزون.</text:p>
            <text:p>* <text:s text:c="2"/>إنتاج المحتوى.</text:p>
            <text:p>* <text:s text:c="2"/>تشغيل قنوات المبيعات عبر وسائل التواصل الاجتماعي.</text:p>
            <text:p>* <text:s text:c="2"/>نمو وتوسيع الأعمال التجارية للتجزئة التابعة لباكيت.</text:p>
            <text:p/>
            <text:p>يوصف هذا النشاط بأنه "أكثر من مجرد مصدر إيرادات" لأنه يعمل كـ **"محرك ابتكار مدمج داخل نظام تشغيل باكيت" (Innovation engine embedded within the Bakeet Operating System)**.</text:p>
            <text:p/>
            <text:p>السبب وراء ذلك هو أن تجربة التحديات التشغيلية firsthand (مثل توفير المنتجات، إدارة المخزون، التنفيذ، وتعامل العملاء) داخل هذه الوحدة تتيح للشركة تعلم دروس قيمة لتحسين المنتجات والخدمات التي تقدمها لجميع البائعين الآخرين في النظام البيئي لباكيت. وبالتالي، فهي لا تحقق أرباحاً مباشرة فحسب، بل تعزز قيمة المنصة بأكملها.</text:p>
          </table:table-cell>
          <table:table-cell table:number-columns-repeated="16378"/>
        </table:table-row>
        <table:table-row table:style-name="ro3">
          <table:table-cell office:value-type="float" office:value="22" table:style-name="ce12">
            <text:p>22</text:p>
          </table:table-cell>
          <table:table-cell office:value-type="string" table:style-name="ce7">
            <text:p>Revenue &amp; Commercial Model</text:p>
          </table:table-cell>
          <table:table-cell office:value-type="string" table:style-name="ce7">
            <text:p>Which business unit owns financial governance, and what does financial success look like according to the documents?</text:p>
          </table:table-cell>
          <table:table-cell office:value-type="string" table:style-name="ce7">
            <text:p>According to the documents, the **Finance &amp; Administration Business Unit** owns financial governance.</text:p>
            <text:p/>
            <text:p>Financial success looks like the following:</text:p>
            <text:p>* <text:s text:c="2"/>Financial information is accurate.</text:p>
            <text:p>* <text:s text:c="2"/>Cash flow remains healthy.</text:p>
            <text:p>* <text:s text:c="2"/>Merchants receive settlements on time.</text:p>
            <text:p>* <text:s text:c="2"/>Operational spending remains disciplined.</text:p>
            <text:p>* <text:s text:c="2"/>People receive the resources they need.</text:p>
            <text:p>* <text:s text:c="2"/>The organization grows without sacrificing financial stability.</text:p>
            <text:p>* <text:s text:c="2"/>Leadership can make confident decisions supported by trusted information.</text:p>
          </table:table-cell>
          <table:table-cell office:value-type="string" table:style-name="ce8">
            <text:p>أي وحدة أعمال تمتلك الحوكمة المالية، وكيف يبدو النجاح المالي وفقاً للوثائق؟</text:p>
          </table:table-cell>
          <table:table-cell office:value-type="string" table:style-name="ce14">
            <text:p>وفقاً للوثائق، وحدة الأعمال التي تمتلك الحوكمة المالية هي **وحدة المالية والإدارة (Finance &amp; Administration Business Unit)**.</text:p>
            <text:p/>
            <text:p>ويبدو النجاح المالي وفقاً للوثائق على النحو التالي:</text:p>
            <text:p>* <text:s text:c="2"/>تكون المعلومات المالية دقيقة.</text:p>
            <text:p>* <text:s text:c="2"/>يبقى التدفق النقدي صحياً.</text:p>
            <text:p>* <text:s text:c="2"/>يتلقى التجار التسويات في الوقت المحدد.</text:p>
            <text:p>* <text:s text:c="2"/>تظل النفقات التشغيلية منضبطة.</text:p>
            <text:p>* <text:s text:c="2"/>يحصل الموظفون على الموارد التي يحتاجونها.</text:p>
            <text:p>* <text:s text:c="2"/>تنمو المنظمة دون التضحية بالاستقرار المالي.</text:p>
          </table:table-cell>
          <table:table-cell table:number-columns-repeated="16378"/>
        </table:table-row>
        <table:table-row table:style-name="ro3">
          <table:table-cell office:value-type="float" office:value="23" table:style-name="ce12">
            <text:p>23</text:p>
          </table:table-cell>
          <table:table-cell office:value-type="string" table:style-name="ce7">
            <text:p>Revenue &amp; Commercial Model</text:p>
          </table:table-cell>
          <table:table-cell office:value-type="string" table:style-name="ce7">
            <text:p>Which AI use cases in the GenAI guide are most directly linked to revenue growth, and why?</text:p>
          </table:table-cell>
          <table:table-cell office:value-type="string" table:style-name="ce7">
            <text:p>Based on the provided documents, the AI use cases most directly linked to revenue growth are found in the **Customer Experience** and **Marketing** sections, specifically:</text:p>
            <text:p/>
            <text:p>1. <text:s/>**AI Customer Support Assistant**: By providing faster answers to orders, refunds, and product inquiries, this assistant reduces customer friction and frustration, which leads to **higher conversion rates** and **better customer retention**.</text:p>
            <text:p>2. <text:s/>**Smart Search Assistant**: This improves product discovery by allowing customers to find what they want using natural language (e.g., "I need a birthday gift" or "Find baby products under 20,000 IQD"). This directly results in **more completed purchases** and **less customer frustration**.</text:p>
            <text:p>3. <text:s/>**Marketing Content Assistant**: While the specific business value is cut off in Context 2, it is listed under the same section as the Customer Experience and Operational use cases. In the context of the other use cases, marketing tools are generally linked to driving traffic and sales. However, the explicit business values listed for revenue growth in the text are tied to the Customer Experience and Operational use cases.</text:p>
            <text:p/>
            <text:p>The **Operational Use Cases** also contribute to revenue indirectly:</text:p>
            <text:p>* <text:s text:c="2"/>**Order Delay and Delivery Risk Assistant**: By detecting risks early, it helps prevent lost sales and improves delivery performance, which supports customer satisfaction and retention.</text:p>
            <text:p>* <text:s text:c="2"/>**Management Report Assistant**: By providing faster decisions and better visibility, it helps the business make more informed strategic choices that can drive growth.</text:p>
            <text:p/>
            <text:p>However, the **Customer Experience Use Cases** (Support and Search) and the implied impact of **Marketing** are the most direct drivers of revenue because they directly influence the customer's ability and willingness to purchase.</text:p>
          </table:table-cell>
          <table:table-cell office:value-type="string" table:style-name="ce8">
            <text:p>ما حالات استخدام الذكاء الاصطناعي في دليل الذكاء الاصطناعي التوليدي الأكثر ارتباطاً مباشراً بنمو الإيرادات، ولماذا؟</text:p>
          </table:table-cell>
          <table:table-cell office:value-type="string" table:style-name="ce14">
            <text:p>بناءً على الوثائق، حالات استخدام الذكاء الاصطناعي الأكثر ارتباطاً مباشرةً بنمو الإيرادات هي:</text:p>
            <text:p/>
            <text:p>1. <text:s/>**مساعد التسوق الذكي (Smart Search Assistant)**</text:p>
            <text:p>2. <text:s/>**مساعد توصية المنتجات (Product Recommendation Assistant)**</text:p>
            <text:p/>
            <text:p>**السبب:**</text:p>
            <text:p>توضح الوثائق أن كلا الوظيفتين تهدفان بشكل مباشر إلى زيادة حجم المبيعات والإيرادات من خلال الآتي:</text:p>
            <text:p>* <text:s text:c="2"/>**زيادة معدل التحويل (Higher conversion rate):** مساعدة العملاء على العثور على ما يريدونه بدقة وسرعة يقلل من فرص التخلي عن عملية الشراء.</text:p>
            <text:p>* <text:s text:c="2"/>**تكبير حجم السلة (Larger basket size):** توصية منتجات إضافية أو مشابهة تشجع العميل على شراء المزيد من العناصر في نفس الطلب.</text:p>
            <text:p>* <text:s text:c="2"/>**اكتشاف منتجات أفضل (Better product discovery):** تسهيل وصول العميل للسلع المناسبة تزيد من احتمالية إتمام الشراء.</text:p>
          </table:table-cell>
          <table:table-cell table:number-columns-repeated="16378"/>
        </table:table-row>
        <table:table-row table:style-name="ro3">
          <table:table-cell office:value-type="float" office:value="24" table:style-name="ce12">
            <text:p>24</text:p>
          </table:table-cell>
          <table:table-cell office:value-type="string" table:style-name="ce7">
            <text:p>Revenue &amp; Commercial Model</text:p>
          </table:table-cell>
          <table:table-cell office:value-type="string" table:style-name="ce7">
            <text:p>What financial data is missing from these documents that would be needed for a complete revenue analysis?</text:p>
          </table:table-cell>
          <table:table-cell office:value-type="string" table:style-name="ce7">
            <text:p>Based on the provided documents, the following financial data is missing, which would be necessary for a complete revenue analysis:</text:p>
            <text:p/>
            <text:p>1. <text:s/>**Specific Revenue Figures**: The documents mention that the Finance unit "owns cash management" and that "cash flow remains healthy," but they do not provide any actual monetary values, total revenue numbers, or profit margins.</text:p>
            <text:p>2. <text:s/>**Breakdown of Revenue Streams**: While the text mentions "Social Commerce" as a unit that operates its own retail businesses and a "Marketplace" model where merchants sell, it does not specify the revenue contribution of each stream (e.g., commission fees vs. direct product sales).</text:p>
            <text:p>3. <text:s/>**Pricing and Margin Data**: There is no information on product costs, selling prices, or profit margins for either the Bakeet-owned brands or the marketplace merchants.</text:p>
            <text:p>4. <text:s/>**Historical Financial Trends**: The documents describe what success "looks like" (e.g., accurate information, disciplined spending) but do not provide historical data to analyze revenue trends over time.</text:p>
            <text:p>5. <text:s/>**Customer Acquisition and Lifetime Value (LTV) Costs**: While customer support and search are mentioned as operational tools, there is no data on the cost of acquiring customers or their long-term value, which are key components of revenue analysis.</text:p>
          </table:table-cell>
          <table:table-cell office:value-type="string" table:style-name="ce8">
            <text:p>ما البيانات المالية غير الموجودة في هذه الوثائق والتي ستكون ضرورية لإجراء تحليل كامل للإيرادات؟</text:p>
          </table:table-cell>
          <table:table-cell office:value-type="string" table:style-name="ce14">
            <text:p>الوثائق المقدمة لا تحتوي على أي بيانات مالية رقمية فعلية (مثل أرقام المبيعات، التكاليف، أو الأرباح). لإجراء تحليل كامل للإيرادات، ستكون البيانات التالية ضرورية ولكنها غير موجودة:</text:p>
            <text:p/>
            <text:p>1. <text:s/>**الإيرادات الإجمالية (Total Revenue):** القيمة النقدية الإجمالية للمبيعات عبر المنصة أو العلامات التجارية المملوكة لشركة باكيت.</text:p>
            <text:p>2. <text:s/>**تفاصيل مصادر الإيرادات:** النسبة المئوية أو المبلغ المحقق من كل مصدر (مثلاً: نسبة الإيرادات من العلامات التجارية المملوكة لشركة باكيت مقابل العمولات من البائعين المستقلين).</text:p>
            <text:p>3. <text:s/>**متوسط حجم السلة (Average Order Value - AOV):** متوسط قيمة الشراء لكل طلب، وهو ضروري لفهم سلوك المستهلك وكفاءة جهود المبيعات.</text:p>
            <text:p>4. <text:s/>**معدل التحويل (Conversion Rate):** نسبة الزوار الذين أتموا عملية شراء، مما يساعد في قياس فعالية أدوات الذكاء الاصطناعي المذكورة (مثل مساعد التسوق).</text:p>
            <text:p>5. <text:s/>**التكاليف التشغيلية والتسويقية:** لمعرفة هامش الربح الصافي من هذه الإيرادات.</text:p>
            <text:p>6. <text:s/>**بيانات التسويات للمتعاملين:** كما ذُكر في سياق نجاح وحدة المالية، معرفة حجم وأوقات تسويات البائعين يعكس صحة التدفق النقدي ونشاط المنصة.</text:p>
          </table:table-cell>
          <table:table-cell table:number-columns-repeated="16378"/>
        </table:table-row>
        <table:table-row table:style-name="ro4">
          <table:table-cell office:value-type="float" office:value="25" table:style-name="ce12">
            <text:p>25</text:p>
          </table:table-cell>
          <table:table-cell office:value-type="string" table:style-name="ce7">
            <text:p>Risk Assessment</text:p>
          </table:table-cell>
          <table:table-cell office:value-type="string" table:style-name="ce7">
            <text:p>Prepare a risk assessment for Bakeet based on the documents, categorized into: strategic, operational, technological, financial, and legal risks.</text:p>
          </table:table-cell>
          <table:table-cell office:value-type="string" table:style-name="ce7">
            <text:p>Based on the provided documents, a comprehensive risk assessment for Bakeet can be constructed by synthesizing the AI use case classifications and the strategic role of the External Legal Office. The documents do not explicitly list separate categories for "Operational" or "Technological" risks outside of the AI context, nor do they detail specific financial loss scenarios beyond the AI decisions. Therefore, the assessment below maps the available information to the requested categories, highlighting where information is derived from the texts and where it must be inferred as a general business risk based on the strategic context.</text:p>
            <text:p/>
            <text:p>### **Bakeet Risk Assessment**</text:p>
            <text:p/>
            <text:p>#### **1. Strategic Risks**</text:p>
            <text:p>* <text:s text:c="2"/>**Reactive vs. Proactive Legal Posture:** Without the External Legal Office’s proactive involvement, strategic initiatives could proceed without appropriate legal frameworks, leading to disputes or regulatory breaches as the organization expands.</text:p>
            <text:p>* <text:s text:c="2"/>**Uncontrolled Expansion:** As Bakeet grows, legal complexity increases. Failure to align legal governance with commercial opportunity could result in unsustainable growth or strategic missteps.</text:p>
            <text:p>* <text:s text:c="2"/>**Partnership Risks:** Strategic partnerships carry higher complexity. Lack of rigorous contract review before signing could expose Bakeet to unfavorable terms or liability.</text:p>
            <text:p/>
            <text:p>#### **2. Operational Risks**</text:p>
            <text:p>* <text:s text:c="2"/>**AI Implementation Errors:**</text:p>
            <text:p><text:s text:c="4"/>* <text:s text:c="2"/>**Low Risk:** Inaccurate internal summaries or social media captions could damage brand tone or internal communication efficiency.</text:p>
            <text:p><text:s text:c="4"/>* <text:s text:c="2"/>**Medium Risk:** Incorrect customer support responses or flawed marketing campaigns could lead to customer dissatisfaction or reputational damage.</text:p>
            <text:p><text:s text:c="4"/>* <text:s text:c="2"/>**High Risk:** Automated refund decisions, vendor penalties, or pricing changes without human oversight could cause operational disruptions, financial loss, or regulatory non-compliance.</text:p>
            <text:p>* <text:s text:c="2"/>**Human-in-the-Loop Failures:** For high-risk AI use cases, failure to maintain mandatory human review could result in unchecked errors in sensitive areas like credit decisions or legal responses.</text:p>
            <text:p/>
            <text:p>#### **3. Technological Risks**</text:p>
            <text:p>* <text:s text:c="2"/>**AI Governance Gaps:**</text:p>
            <text:p><text:s text:c="4"/>* <text:s text:c="2"/>Lack of audit logs for high-risk AI decisions could make it impossible to trace errors or comply with regulatory requirements.</text:p>
            <text:p><text:s text:c="4"/>* <text:s text:c="2"/>Use of sensitive data in personalized offers without proper anonymization or secure (private/internal) AI environments could lead to data breaches.</text:p>
            <text:p>* <text:s text:c="2"/>**System Dependency:** Over-reliance on automated systems for critical functions (e.g., vendor penalties) without robust fallback mechanisms could disrupt operations if the AI fails.</text:p>
            <text:p/>
            <text:p>#### **4. Financial Risks**</text:p>
            <text:p>* <text:s text:c="2"/>**AI-Driven Financial Decisions:**</text:p>
            <text:p><text:s text:c="4"/>* <text:s text:c="2"/>Automated refund decisions, customer credit/payment decisions, and AI pricing changes pose direct financial risks if the AI miscalculates or acts unfairly, leading to revenue loss or legal penalties.</text:p>
            <text:p>* <text:s text:c="2"/>**Contractual Liability:** Poorly reviewed contracts could result in unfavorable financial terms, penalties, or costly disputes.</text:p>
            <text:p>* <text:s text:c="2"/>**Regulatory Fines:** Failure to ensure compliance before regulations become issues could result in significant fines and legal costs.</text:p>
            <text:p/>
            <text:p>#### **5. Legal Risks**</text:p>
            <text:p>* <text:s text:c="2"/>**Regulatory Non-Compliance:** As regulatory obligations increase with expansion, failure to proactively ensure compliance could lead to legal sanctions.</text:p>
            <text:p>* <text:s text:c="2"/>**Dispute Management:** Lack of established legal frameworks before disputes arise could exacerbate conflicts and increase litigation costs.</text:p>
            <text:p>* <text:s text:c="2"/>**Contractual Integrity:** Without ownership of contractual integrity by the External Legal Office, Bakeet may face risks from ambiguous or unfavorable contracts.</text:p>
            <text:p>* <text:s text:c="2"/>**Legal Risk Assessment:** Failure to conduct proper legal risk assessments for strategic initiatives could expose the company to unforeseen liabilities.</text:p>
            <text:p/>
            <text:p>---</text:p>
            <text:p/>
            <text:p>### **Risk Controls &amp; Mitigation Strategies (Based on Documents)**</text:p>
            <text:p/>
            <text:p>| Risk Category | Control Measures |</text:p>
            <text:p>| :--- | :--- |</text:p>
            <text:p>| **AI Use Cases** | **Low Risk:** Basic human review.&lt;br&gt;**Medium Risk:** Human approval, data anonymization, department owner validation.&lt;br&gt;**High Risk:** Leadership approval, legal/compliance review, mandatory human-in-the-loop, audit logs, private/internal AI environment. |</text:p>
            <text:p>| **Legal &amp; Compliance** | **Proactive Legal Office:** Involved before risks emerge; contracts reviewed before signing; compliance ensured before regulations become issues.&lt;br&gt;**Ownership:** External Legal Office owns legal governance, contractual integrity, regulatory compliance, and legal risk management. |</text:p>
            <text:p>| **Strategic Initiatives** | Close collaboration between leadership and the External Legal Office to ensure every strategic initiative is supported by appropriate legal frameworks. |</text:p>
            <text:p/>
            <text:p>### **Conclusion**</text:p>
            <text:p>Bakeet’s risk management strategy is heavily centered on **proactive legal governance** and **structured AI risk classification**. The External Legal Office serves as a critical control point for strategic, legal, and contractual risks, while the AI risk classification framework provides a tiered approach to managing technological and operational risks associated with automation. To further strengthen the assessment, Bakeet should explicitly define financial impact thresholds for high-risk AI decisions and ensure robust audit trails for all AI-driven financial actions.</text:p>
          </table:table-cell>
          <table:table-cell office:value-type="string" table:style-name="ce8">
            <text:p>أعدّ تقييماً للمخاطر الخاصة بباكيت استناداً إلى الوثائق، مصنفاً إلى: مخاطر استراتيجية، وتشغيلية، وتكنولوجية، ومالية، وقانونية.</text:p>
          </table:table-cell>
          <table:table-cell office:value-type="string" table:style-name="ce14">
            <text:p>بناءً على الوثائق المقدمة، إليك تقييم للمخاطر الخاصة بشركة "باكيت" مصنفاً حسب الفئات المطلوبة:</text:p>
            <text:p/>
            <text:p>**1. المخاطر الاستراتيجية (Strategic Risks)**</text:p>
            <text:p>* <text:s text:c="2"/>**نقص الشفافية في اختيار الأدوات:** قد يؤدي الاعتماد على أدوات ذكاء اصطناعي مختلفة دون استراتيجية موحدة إلى تجزئة العمليات أو فقدان رؤية شاملة للأداء.</text:p>
            <text:p>* <text:s text:c="2"/>**اعتماد كبير على الشركاء التقنيين:** كما يشير القسم 4.7، هناك مخاطر مرتبطة بـ "الشريك التقني الاستراتيجي" و"المكتب القانوني الخارجي"، حيث أن نجاح العمليات يعتمد على التزام هذه الأطراف الخارجية بمعايير الجودة والحماية.</text:p>
            <text:p>* <text:s text:c="2"/>**إدارة السمعة العامة:** استخدام الذكاء الاصطناعي في الحملات التسويقية العامة أو الردود على العملاء يحمل مخاطر إذا لم تتم مراجعتها بشرياً، مما قد يؤثر على صورة العلامة التجارية.</text:p>
            <text:p/>
            <text:p>**2. المخاطر التشغيلية (Operational Risks)**</text:p>
            <text:p>* <text:s text:c="2"/>**فشل المراجعة البشرية (Human-in-the-loop):** الوثائق تشدد على ضرورة المراجعة البشرية للمخاطر المتوسطة والعالية. أي تقصير في هذه الخطوة (مثل عدم اعتماد مدير القسم أو القيادة) قد يؤدي إلى قرارات خاطئة أو ردود غير لائقة.</text:p>
            <text:p>* <text:s text:c="2"/>**إساءة استخدام الأدوات:** خطر قيام الموظفين باستخدام أدوات الذكاء الاصطناعي للبيانات غير المناسبة أو خارج النطاق المصرح به، مما يتطلب أنظمة إبلاغ عن الإساءة وضوابط واضحة حول من يمكنه استخدام الأدوات وأي بيانات يمكن استخدامها.</text:p>
            <text:p>* <text:s text:c="2"/>**تخزين البيانات:** عدم وضوح أو عدم الالتزام بقواعد تخزين مخرجات الذكاء الاصطناعي (خاصة الحساسة منها) قد يؤدي إلى تسرب بيانات أو فقدان السيطرة على المعلومات الداخلية.</text:p>
            <text:p/>
            <text:p>**3. المخاطر التكنولوجية (Technological Risks)**</text:p>
            <text:p>* <text:s text:c="2"/>**عدم ملاءمة الأدوات للحالة:** خطر استخدام أداة ذكاء اصطناعي غير مناسبة لنوع المهمة (مثلاً، استخدام نموذج عام لمهام تتطلب دقة عالية أو سرية)، حيث تنص الوثائق على ضرورة اختيار الأداة المناسبة لكل حالة استخدام.</text:p>
            <text:p>* <text:s text:c="2"/>**أمن البيئة الداخلية:** بالنسبة للمخاطر العالية، هناك حاجة لبيئة ذكاء اصطناعي خاصة/داخلية. الفشل في تأمين هذه البيئة أو دمجها بشكل صحيح مع الأنظمة الحالية يعرض البيانات للخطر.</text:p>
            <text:p>* <text:s text:c="2"/>**التحيز أو الأخطاء في المخرجات:** الاعتماد على الذكاء الاصطناعي في صياغة المحتوى أو التحليل دون فحص دقيق قد يؤدي إلى مخرجات غير دقيقة أو متحيزة.</text:p>
            <text:p/>
            <text:p>**4. المخاطر المالية (Financial Risks)**</text:p>
            <text:p>* <text:s text:c="2"/>**قرارات التسعير الآلية:** الوثائق تصنف "تغييرات الأسعار المدعومة بالذكاء الاصطناعي" كمخاطر عالية. الأخطاء في الخوارزميات قد تؤدي إلى تسعير خاطئ يؤثر على هوامش الربح أو القدرة التنافسية.</text:p>
            <text:p>* <text:s text:c="2"/>**العقوبات المالية الآلية:** فرض عقوبات آلية على الموردين قد يؤدي إلى خسائر مالية غير مقصودة أو نزاعات تجارية مكلفة إذا كانت القرارات خاطئة.</text:p>
            <text:p>* <text:s text:c="2"/>**قرارات الائتمان/المدفوعات:** اتخاذ قرارات مالية شخصية للعملاء باستخدام الذكاء الاصطناعي دون رقابة صارمة قد يعرض الشركة لمخاطر الغش أو الخسائر الائتمانية.</text:p>
            <text:p/>
            <text:p>**5. المخاطر القانونية (Legal Risks)**</text:p>
            <text:p>* <text:s text:c="2"/>**عدم الامتثال التنظيمي:** الردود القانونية أو التنظيمية المدعومة بالذكاء الاصطناعي تتطلب مراجعة قانونية صارمة. أي خطأ قد يعرض الشركة للمساءلة القانونية أو الغرامات.</text:p>
            <text:p>* <text:s text:c="2"/>**استخدام البيانات الحساسة:** إنشاء عروض شخصية تستخدم بيانات حساسة للعملاء يشكل خطراً قانونياً كبيراً يتطلب موافقة القيادة ومراجعة الامتثال.</text:p>
            <text:p>* <text:s text:c="2"/>**العقود والشراكات:** كما يشير القسم 4.8، تزداد التعقيدات القانونية مع التوسع. الاعتماد على الذكاء الاصطناعي في صياغة أو مراجعة العقود دون تدخل المكتب القانوني الخارجي قد يؤدي إلى بنود غير عادلة أو مخاطر غير مكتشفة في الشراكات الاستراتيجية.</text:p>
          </table:table-cell>
          <table:table-cell table:number-columns-repeated="16378"/>
        </table:table-row>
        <table:table-row table:style-name="ro3">
          <table:table-cell office:value-type="float" office:value="26" table:style-name="ce12">
            <text:p>26</text:p>
          </table:table-cell>
          <table:table-cell office:value-type="string" table:style-name="ce7">
            <text:p>Risk Assessment</text:p>
          </table:table-cell>
          <table:table-cell office:value-type="string" table:style-name="ce7">
            <text:p>What legal and regulatory risks does the document anticipate, and how is Bakeet structured to handle them?</text:p>
          </table:table-cell>
          <table:table-cell office:value-type="string" table:style-name="ce7">
            <text:p>Based on the provided documents, Bakeet anticipates that as the organization expands, **legal complexity, sophisticated contracts, strategic partnerships, and regulatory obligations** will increase. The primary risk is that these factors could lead to disputes and regulatory issues if not managed proactively.</text:p>
            <text:p/>
            <text:p>To handle these risks, Bakeet has established the **External Legal Office**, which is structured to act as a **strategic partner** rather than a reactive advisor. The specific handling mechanisms include:</text:p>
            <text:p/>
            <text:p>**1. Proactive Approach**</text:p>
            <text:p>The document emphasizes a proactive stance to ensure protection before issues arise:</text:p>
            <text:p>* <text:s text:c="2"/>Involvement begins **before risks emerge**.</text:p>
            <text:p>* <text:s text:c="2"/>Contracts are reviewed **before they are signed**.</text:p>
            <text:p>* <text:s text:c="2"/>Compliance is ensured **before regulations become issues**.</text:p>
            <text:p>* <text:s text:c="2"/>Legal frameworks are established **before disputes arise**.</text:p>
            <text:p/>
            <text:p>**2. Strategic Integration**</text:p>
            <text:p>* <text:s text:c="2"/>The External Legal Office works closely with leadership to ensure every **strategic initiative** is supported by appropriate legal frameworks.</text:p>
            <text:p>* <text:s text:c="2"/>It supports every major business decision, ensuring that growth remains protected rather than hindered by legal complexities.</text:p>
            <text:p/>
            <text:p>**3. Specific Responsibilities and Ownership**</text:p>
            <text:p>The External Legal Office is explicitly assigned ownership of:</text:p>
            <text:p>* <text:s text:c="2"/>**Legal Governance:** Providing legal advisory services and corporate governance guidance.</text:p>
            <text:p>* <text:s text:c="2"/>**Contractual Integrity:** Handling contract drafting, review, and ensuring integrity.</text:p>
            <text:p>* <text:s text:c="2"/>**Regulatory Compliance:** Providing regulatory compliance support.</text:p>
            <text:p>* <text:s text:c="2"/>**Legal Risk Management:** Managing dispute management and conducting legal risk assessments.</text:p>
            <text:p/>
            <text:p>By centralizing these functions within the External Legal Office, Bakeet aims to maintain confidence and move quickly while ensuring the organization remains legally protected during its expansion.</text:p>
          </table:table-cell>
          <table:table-cell office:value-type="string" table:style-name="ce8">
            <text:p>ما المخاطر القانونية والتنظيمية التي تتوقعها الوثيقة، وكيف تم تنظيم باكيت للتعامل معها؟</text:p>
          </table:table-cell>
          <table:table-cell office:value-type="string" table:style-name="ce14">
            <text:p>بناءً على الوثائق المقدمة (تحديداً القسم 4.8 الخاص بالمكتب القانوني الخارجي)، إليك تفاصيل المخاطر القانونية والتنظيمية المتوقعة وكيفية تنظيم "باكيت" للتعامل معها:</text:p>
            <text:p/>
            <text:p>**أولاً: المخاطر القانونية والتنظيمية المتوقعة**</text:p>
            <text:p>تشير الوثائق إلى أن هذه المخاطر تزداد تعقيداً مع توسع الشركة، وتشمل:</text:p>
            <text:p>1. <text:s/>**تعقيد العقود:** تحول العقود إلى أشكال أكثر sophistication (تعقيداً وتخصصاً) مع نمو الأعمال.</text:p>
            <text:p>2. <text:s/>**الشراكات الاستراتيجية:** زيادة المخاطر المرتبطة بإبرام شراكات استراتيجية جديدة.</text:p>
            <text:p>3. <text:s/>**الالتزامات التنظيمية:** تزايد المتطلبات والالتزامات القانونية الخارجية التي يجب الوفاء بها.</text:p>
            <text:p>4. <text:s/>**النزاعات:** احتمالية نشوب نزاعات قانونية إذا لم تُؤطَّر الأطر القانونية بشكل صحيح.</text:p>
            <text:p/>
            <text:p>**ثانياً: كيفية تنظيم "باكيت" للتعامل معها**</text:p>
            <text:p>لقد أنشأت "باكيت" **المكتب القانوني الخارجي (External Legal Office)** كجزء استراتيجي وليس مجرد مستشار تفاعلي. وتنظيم التعامل يتم عبر النقاط التالية:</text:p>
            <text:p/>
            <text:p>1. <text:s/>**النهج الاستباقي (Proactive Approach):**</text:p>
            <text:p><text:s text:c="4"/>* <text:s text:c="2"/>لا ينتظر المكتب ظهور المخاطر، بل يتدخل قبل حدوثها.</text:p>
            <text:p><text:s text:c="4"/>* <text:s text:c="2"/>تتم مراجعة العقود **قبل** توقيعها.</text:p>
            <text:p><text:s text:c="4"/>* <text:s text:c="2"/>يتم ضمان الامتثال **قبل** أن تصبح اللوائح التنظيمية مشكلة.</text:p>
            <text:p><text:s text:c="4"/>* <text:s text:c="2"/>تُؤسس الأطر القانونية **قبل** نشوب النزاعات.</text:p>
            <text:p/>
            <text:p>2. <text:s/>**الدور الاستراتيجي:**</text:p>
            <text:p><text:s text:c="4"/>* <text:s text:c="2"/>يعمل المكتب كشريك استراتيجي يدعم كل قرار تجاري رئيسي.</text:p>
            <text:p><text:s text:c="4"/>* <text:s text:c="2"/>يضمن أن كل مبادرة استراتيجية مدعومة بأطر قانونية مناسبة.</text:p>
            <text:p/>
            <text:p>3. <text:s/>**المسؤوليات المحددة:**</text:p>
            <text:p><text:s text:c="4"/>* <text:s text:c="2"/>تقديم الاستشارات القانونية، وصياغة ومراجعة العقود.</text:p>
            <text:p><text:s text:c="4"/>* <text:s text:c="2"/>دعم الامتثال التنظيمي وإدارة النزاعات.</text:p>
            <text:p><text:s text:c="4"/>* <text:s text:c="2"/>تقديم إرشادات حول حوكمة الشركات وتقييم المخاطر القانونية.</text:p>
            <text:p/>
            <text:p>4. <text:s/>**الملكية والمسؤولية (Ownership):**</text:p>
            <text:p><text:s text:c="4"/>* <text:s text:c="2"/>يمتلك المكتب القانوني الخارجي "حوكمة القانونية" بشكل كامل، بما في ذلك:</text:p>
            <text:p><text:s text:c="8"/>* <text:s text:c="2"/>سلامة العقود (Contractual Integrity).</text:p>
            <text:p><text:s text:c="8"/>* <text:s text:c="2"/>الامتثال التنظيمي (Regulatory Compliance).</text:p>
            <text:p><text:s text:c="8"/>* <text:s text:c="2"/>إدارة المخاطر القانونية (Legal Risk Management).</text:p>
            <text:p/>
            <text:p>هذا التنظيم يهدف إلى تمكين "باكيت" من التحرك بسرعة وثقة، مع ضمان أن النمو التجاري يتم بحماية قانونية قوية.</text:p>
          </table:table-cell>
          <table:table-cell table:number-columns-repeated="16378"/>
        </table:table-row>
        <table:table-row table:style-name="ro3">
          <table:table-cell office:value-type="float" office:value="27" table:style-name="ce12">
            <text:p>27</text:p>
          </table:table-cell>
          <table:table-cell office:value-type="string" table:style-name="ce7">
            <text:p>Risk Assessment</text:p>
          </table:table-cell>
          <table:table-cell office:value-type="string" table:style-name="ce7">
            <text:p>According to the GenAI guide, what risks come with AI adoption, and what controls are recommended?</text:p>
          </table:table-cell>
          <table:table-cell office:value-type="string" table:style-name="ce7">
            <text:p>Based on the "Practical Guide: Applying GenAI Lessons to Bakeet E-Commerce Application," AI adoption risks are categorized into three levels: **Low**, **Medium**, and **High**. The recommended controls for each are as follows:</text:p>
            <text:p/>
            <text:p>### **1. Low Risk Use Cases**</text:p>
            <text:p>* <text:s text:c="2"/>**Examples:** Drafting product descriptions, internal meeting summaries, social media caption drafts, and internal brainstorming.</text:p>
            <text:p>* <text:s text:c="2"/>**Recommended Control:** Basic human review.</text:p>
            <text:p/>
            <text:p>### **2. Medium Risk Use Cases**</text:p>
            <text:p>* <text:s text:c="2"/>**Examples:** Customer support draft responses, marketing campaign suggestions, management reports, and vendor performance summaries.</text:p>
            <text:p>* <text:s text:c="2"/>**Recommended Controls:**</text:p>
            <text:p><text:s text:c="4"/>* <text:s text:c="2"/>Human approval is required.</text:p>
            <text:p><text:s text:c="4"/>* <text:s text:c="2"/>Data anonymization where possible.</text:p>
            <text:p><text:s text:c="4"/>* <text:s text:c="2"/>Department owner validation.</text:p>
            <text:p/>
            <text:p>### **3. High Risk Use Cases**</text:p>
            <text:p>* <text:s text:c="2"/>**Examples:** Automated refund decisions, automated vendor penalties, customer credit/payment decisions, AI pricing changes, legal or regulatory responses, and personalized offers using sensitive data.</text:p>
            <text:p>* <text:s text:c="2"/>**Recommended Controls:**</text:p>
            <text:p><text:s text:c="4"/>* <text:s text:c="2"/>Leadership approval.</text:p>
            <text:p><text:s text:c="4"/>* <text:s text:c="2"/>Legal/compliance review.</text:p>
            <text:p><text:s text:c="4"/>* <text:s text:c="2"/>Mandatory human-in-the-loop.</text:p>
            <text:p><text:s text:c="4"/>* <text:s text:c="2"/>Audit logs.</text:p>
            <text:p><text:s text:c="4"/>* <text:s text:c="2"/>Use of a private/internal AI environment.</text:p>
            <text:p/>
            <text:p>### **General Governance Rules for All AI Use**</text:p>
            <text:p>To mitigate data privacy and security risks, the guide also outlines general rules:</text:p>
            <text:p>* <text:s text:c="2"/>**Data Rules:** Do not enter sensitive data into public AI tools without approval. This includes customer personal information (phone numbers, addresses, payment info, full order history linked to identity), vendor confidential data, financial reports, legal/regulatory documents, and strategic business plans.</text:p>
            <text:p>* <text:s text:c="2"/>**Human Review Rules:** Human review is required for all customer-facing messages.</text:p>
          </table:table-cell>
          <table:table-cell office:value-type="string" table:style-name="ce8">
            <text:p>وفقاً لدليل الذكاء الاصطناعي التوليدي، ما المخاطر المصاحبة لتبني الذكاء الاصطناعي، وما الضوابط الموصى بها؟</text:p>
          </table:table-cell>
          <table:table-cell office:value-type="string" table:style-name="ce14">
            <text:p>بناءً على الوثائق المقدمة، وتحديدًا القسم المتعلق بـ "تصنيف المخاطر لحالات استخدام Bakeet AI" (Context 0) وقواعد الحوكمة (Context 1)، إليك المخاطر والضوابط الموصى بها:</text:p>
            <text:p/>
            <text:p>**أولاً: تصنيف المخاطر وحالات الاستخدام**</text:p>
            <text:p/>
            <text:p>تم تقسيم المخاطر إلى ثلاث فئات رئيسية:</text:p>
            <text:p/>
            <text:p>**1. مخاطر منخفضة (Low Risk)**</text:p>
            <text:p>* <text:s text:c="2"/>**أمثلة:** صياغة وصف المنتجات، ملخصات الاجتماعات الداخلية، مسودات منشورات وسائل التواصل الاجتماعي، العصف الذهني الداخلي.</text:p>
            <text:p>* <text:s text:c="2"/>**الضبط الموصى به:** مراجعة بشرية أساسية.</text:p>
            <text:p/>
            <text:p>**2. مخاطر متوسطة (Medium Risk)**</text:p>
            <text:p>* <text:s text:c="2"/>**أمثلة:** ردود دعم العملاء المسودة، اقتراحات حملات التسويق، تقارير الإدارة، ملخصات أداء الموردين.</text:p>
            <text:p>* <text:s text:c="2"/>**الضوابط الموصى بها:**</text:p>
            <text:p><text:s text:c="4"/>* <text:s text:c="2"/>اشتراط الموافقة البشرية.</text:p>
            <text:p><text:s text:c="4"/>* <text:s text:c="2"/>إخفاء هوية البيانات حيثما أمكن.</text:p>
            <text:p><text:s text:c="4"/>* <text:s text:c="2"/>اعتماد من قبل مالك القسم.</text:p>
            <text:p/>
            <text:p>**3. مخاطر عالية (High Risk)**</text:p>
            <text:p>* <text:s text:c="2"/>**أمثلة:** قرارات استرداد الأموال الآلية، عقوبات الموردين الآلية، قرارات الائتمان/المدفوعات للعملاء، تغييرات الأسعار المدعومة بالذكاء الاصطناعي، الردود القانونية أو التنظيمية، العروض الشخصية التي تستخدم بيانات حساسة.</text:p>
            <text:p>* <text:s text:c="2"/>**الضوابط الموصى بها:**</text:p>
            <text:p><text:s text:c="4"/>* <text:s text:c="2"/>موافقة القيادة العليا.</text:p>
            <text:p><text:s text:c="4"/>* <text:s text:c="2"/>مراجعة قانونية/امتثال.</text:p>
            <text:p><text:s text:c="4"/>* <text:s text:c="2"/>اشتراط وجود إنسان في الحلقة (Human-in-the-loop) بشكل إلزامي.</text:p>
            <text:p><text:s text:c="4"/>* <text:s text:c="2"/>وجود سجلات تدقيق (Audit logs).</text:p>
            <text:p><text:s text:c="4"/>* <text:s text:c="2"/>استخدام بيئة ذكاء اصطناعي خاصة/داخلية.</text:p>
            <text:p/>
            <text:p>**ثانياً: ضوابط حوكمة البيانات والمراجعة (من السياق 1)**</text:p>
            <text:p/>
            <text:p>لتقليل المخاطر، يجب على Bakeet اتباع القواعد التالية قبل توسيع نطاق استخدام الذكاء الاصطناعي:</text:p>
            <text:p/>
            <text:p>* <text:s text:c="2"/>**قواعد البيانات:**</text:p>
            <text:p><text:s text:c="4"/>* <text:s text:c="2"/>عدم إدخال البيانات التالية في أدوات الذكاء الاصطناعي العامة دون موافقة:</text:p>
            <text:p><text:s text:c="8"/>* <text:s text:c="2"/>معلومات العملاء الشخصية (أرقام الهواتف، العناوين).</text:p>
            <text:p><text:s text:c="8"/>* <text:s text:c="2"/>معلومات الدفع.</text:p>
            <text:p><text:s text:c="8"/>* <text:s text:c="2"/>تاريخ الطلبات الكامل المرتبط بهوية العميل.</text:p>
            <text:p><text:s text:c="8"/>* <text:s text:c="2"/>بيانات الموردين السرية.</text:p>
            <text:p><text:s text:c="8"/>* <text:s text:c="2"/>التقارير المالية.</text:p>
            <text:p><text:s text:c="8"/>* <text:s text:c="2"/>الوثائق القانونية أو التنظيمية.</text:p>
            <text:p><text:s text:c="8"/>* <text:s text:c="2"/>خطط الأعمال الاستراتيجية.</text:p>
            <text:p/>
            <text:p>* <text:s text:c="2"/>**قواعد المراجعة البشرية:**</text:p>
            <text:p><text:s text:c="4"/>* <text:s text:c="2"/>المراجعة البشرية إلزامية لجميع الرسائل الموجهة للعملاء.</text:p>
            <text:p/>
            <text:p>باختصار، يوصي الدليل بالبدء بمشاريع تجريبية ذات مخاطر منخفضة (مثل مساعد تقارير الإدارة)، مع تعزيز الضوابط البشرية والقانونية كلما زادت حساسية البيانات أو تأثير القرار على العملاء أو الموردين.</text:p>
          </table:table-cell>
          <table:table-cell table:number-columns-repeated="16378"/>
        </table:table-row>
        <table:table-row table:style-name="ro2">
          <table:table-cell office:value-type="float" office:value="28" table:style-name="ce12">
            <text:p>28</text:p>
          </table:table-cell>
          <table:table-cell office:value-type="string" table:style-name="ce7">
            <text:p>Risk Assessment</text:p>
          </table:table-cell>
          <table:table-cell office:value-type="string" table:style-name="ce7">
            <text:p>What should AI never do without human approval at Bakeet?</text:p>
          </table:table-cell>
          <table:table-cell office:value-type="string" table:style-name="ce7">
            <text:p>Based on the provided documents, AI should never perform the following actions without human approval at Bakeet:</text:p>
            <text:p/>
            <text:p>* <text:s text:c="2"/>**Customer-facing messages**</text:p>
            <text:p>* <text:s text:c="2"/>**Refund decisions**</text:p>
            <text:p>* <text:s text:c="2"/>**Vendor penalties**</text:p>
            <text:p>* <text:s text:c="2"/>**Pricing decisions**</text:p>
            <text:p>* <text:s text:c="2"/>**Legal or compliance content**</text:p>
            <text:p>* <text:s text:c="2"/>**Financial reports**</text:p>
            <text:p>* <text:s text:c="2"/>**Public marketing campaigns**</text:p>
            <text:p>* <text:s text:c="2"/>**High-value customer complaints**</text:p>
            <text:p/>
            <text:p>Additionally, the documents specify that AI should not process certain types of sensitive data into public AI tools without approval, including:</text:p>
            <text:p>* <text:s text:c="2"/>Customer personal information (phone numbers, addresses, payment information, full order history linked to customer identity)</text:p>
            <text:p>* <text:s text:c="2"/>Vendor confidential data</text:p>
            <text:p>* <text:s text:c="2"/>Financial reports</text:p>
            <text:p>* <text:s text:c="2"/>Legal or regulatory documents</text:p>
            <text:p>* <text:s text:c="2"/>Strategic business plans</text:p>
          </table:table-cell>
          <table:table-cell office:value-type="string" table:style-name="ce8">
            <text:p>ما الأمور التي يجب ألا يقوم بها الذكاء الاصطناعي في باكيت دون موافقة بشرية؟</text:p>
          </table:table-cell>
          <table:table-cell office:value-type="string" table:style-name="ce14">
            <text:p>بناءً على الوثائق المقدمة، هناك قائمة محددة بالأعمال التي **يجب ألا يقوم بها الذكاء الاصطناعي في شركة "باكيت" دون موافقة ومراجعة بشرية**، ويمكن تصنيفها إلى فئتين رئيسيتين:</text:p>
            <text:p/>
            <text:p>**أولاً: عمليات لا يجب أن تتم آلياً نهائياً (يُمنع منها الذكاء الاصطناعي):**</text:p>
            <text:p>وفقاً للقسم المتعلق بـ "Bakeet Management Report Assistant" (Context 3)، يجب على الذكاء الاصطناعي ألا يقوم بالتالي:</text:p>
            <text:p>1. <text:s/>**اتخاذ قرارات أعمال نهائية:** لا يمكن للذكاء الاصطناعي حسم الأمور الاستراتيجية أو التشغيلية الحساسة.</text:p>
            <text:p>2. <text:s/>**الموافقة على استرداد الأموال (Refunds):** يجب أن يظل القرار البشري是唯一اً في هذه القضية.</text:p>
            <text:p>3. <text:s/>**تغيير الأسعار تلقائياً:** لا يجوز للذكاء الاصطناعي تعديل التسعير دون تدخل بشري.</text:p>
            <text:p>4. <text:s/>**الاتصال بالعملاء دون موافقة:** لا يمكنه مبادلة الرسائل أو التواصل مع العملاء بشكل مستقل.</text:p>
            <text:p>5. <text:s/>**معاقبة الموردين دون مراجعة بشرية:** أي عقوبات أو جزاءات للموردين تتطلب تدقيقاً بشرياً.</text:p>
            <text:p>6. <text:s/>**استخدام بيانات العملاء الحساسة في أدوات غير معتمدة:** يجب الامتناع عن إدخال هذه البيانات في أنظمة ذكاء اصطناعي عامة أو غير مصرح بها.</text:p>
            <text:p/>
            <text:p>**ثانياً: القرارات التي تتطلب "مراجعة بشرية إلزامية" (Human Review):**</text:p>
            <text:p>وفقاً لقواعد حوكمة الذكاء الاصطناعي (Context 0 و Context 1)، يجب أن تخضع المخرجات أو القرارات التالية لمراجعة واعتماد من قبل موظف بشري قبل التنفيذ أو الإرسال:</text:p>
            <text:p>1. <text:s/>**الرسائل الموجهة للعملاء:** أي اتصال خارجي مع العملاء.</text:p>
            <text:p>2. <text:s/>**قرارات استرداد الأموال.**</text:p>
            <text:p>3. <text:s/>**عقوبات الموردين.**</text:p>
            <text:p>4. <text:s/>**قرارات التسعير.**</text:p>
            <text:p>5. <text:s/>**المحتوى القانوني أو المتعلق بالامتثال.**</text:p>
            <text:p>6. <text:s/>**التقارير المالية.**</text:p>
            <text:p>7. <text:s/>**الحملات التسويقية العامة.**</text:p>
            <text:p>8. <text:s/>**شكاوى العملاء عالية القيمة.**</text:p>
            <text:p/>
            <text:p>باختصار، دور الذكاء الاصطناعي في "باكيت" هو دور **داعم** (للصياغة، التحليل، والمقترحات)، بينما يبقى **اتخاذ القرار النهائي والتنفيذ** محصوراً بشكل حصري على البشر لضمان الأمان والامتثال.</text:p>
          </table:table-cell>
          <table:table-cell table:number-columns-repeated="16378"/>
        </table:table-row>
        <table:table-row table:style-name="ro3">
          <table:table-cell office:value-type="float" office:value="29" table:style-name="ce12">
            <text:p>29</text:p>
          </table:table-cell>
          <table:table-cell office:value-type="string" table:style-name="ce7">
            <text:p>Risk Assessment</text:p>
          </table:table-cell>
          <table:table-cell office:value-type="string" table:style-name="ce7">
            <text:p>If the partnership with 101 ended suddenly, what would be the impact on Bakeet based on the ownership model described?</text:p>
          </table:table-cell>
          <table:table-cell office:value-type="string" table:style-name="ce7">
            <text:p>Based on the documents provided, if the partnership with 101 ended suddenly, the impact on Bakeet would be significant but strategically manageable due to the clear separation of ownership.</text:p>
            <text:p/>
            <text:p>**1. Immediate Operational Impact (Technology Execution)**</text:p>
            <text:p>Bakeet would lose its partner responsible for **technology execution**. Since 101 owns the following, Bakeet would face an immediate gap in:</text:p>
            <text:p>* <text:s text:c="2"/>Software engineering, development, and maintenance.</text:p>
            <text:p>* <text:s text:c="2"/>Application architecture and infrastructure management.</text:p>
            <text:p>* <text:s text:c="2"/>DevOps, integrations, and system monitoring.</text:p>
            <text:p>* <text:s text:c="2"/>Continuous platform enhancement and deployment quality.</text:p>
            <text:p/>
            <text:p>Bakeet would no longer have a partner transforming business requirements into scalable, secure, and reliable digital solutions.</text:p>
            <text:p/>
            <text:p>**2. Strategic and Business Continuity (No Immediate Product Loss)**</text:p>
            <text:p>Crucially, the documents state that **101 does not own product strategy**, and **Bakeet owns the product, the customer, and the operational model**. Therefore:</text:p>
            <text:p>* <text:s text:c="2"/>**Product Vision:** Bakeet retains full ownership of the product vision and strategy. The business direction would not be lost.</text:p>
            <text:p>* <text:s text:c="2"/>**Customer Relationship:** Bakeet owns the customer, so the customer relationship and brand equity remain intact.</text:p>
            <text:p>* <text:s text:c="2"/>**Operational Model:** Bakeet owns the operational model, meaning the core business logic and commerce processes are defined by Bakeet, not 101.</text:p>
            <text:p/>
            <text:p>**3. Required Action for Bakeet**</text:p>
            <text:p>To maintain operations, Bakeet would need to:</text:p>
            <text:p>* <text:s text:c="2"/>Find a new strategic technology partner or build an internal technology team to take over the responsibilities currently held by 101 (software delivery, quality, architecture, infrastructure, and deployment).</text:p>
            <text:p>* <text:s text:c="2"/>Ensure the new partner understands that they are executing on Bakeet’s vision, not defining it.</text:p>
            <text:p/>
            <text:p>In summary, while Bakeet would lose its technology execution capabilities immediately, it would **not** lose its business identity, product, or customer base. The primary challenge would be finding a replacement for the technical execution layer, not the strategic business layer.</text:p>
          </table:table-cell>
          <table:table-cell office:value-type="string" table:style-name="ce8">
            <text:p>إذا انتهت الشراكة مع 101 فجأة، فما الأثر المتوقع على باكيت استناداً إلى نموذج الملكية الموضح في الوثائق؟</text:p>
          </table:table-cell>
          <table:table-cell office:value-type="string" table:style-name="ce14">
            <text:p>استناداً إلى الوثائق المقدمة (تحديداً السياق 0 والسياق 1)، فإن انتهاء الشراكة المفاجئ مع "101" سيؤثر على "باكيت" بشكل كبير في المجالات التقنية، وذلك بسبب توزيع الملكية المحدد بوضوح:</text:p>
            <text:p/>
            <text:p>**1. فقدان الملكية التقنية والبنية التحتية:**</text:p>
            <text:p>تمتلك شركة "101" بشكل حصري المجالات التالية التي تعتبر أساسية لتشغيل المنصة:</text:p>
            <text:p>* <text:s text:c="2"/>تسليم التكنولوجيا (Technology delivery).</text:p>
            <text:p>* <text:s text:c="2"/>جودة البرمجيات (Software quality).</text:p>
            <text:p>* <text:s text:c="2"/>الهندسة المعمارية التقنية (Technical architecture).</text:p>
            <text:p>* <text:s text:c="2"/>موثوقية البنية التحتية (Infrastructure reliability).</text:p>
            <text:p>* <text:s text:c="2"/>جودة النشر والإطلاق (Deployment quality).</text:p>
            <text:p/>
            <text:p>بما أن "باكيت" لا تملك هذه الجوانب، فإن الانفصال يعني فقدان السيطرة المباشرة على استمرارية وجودة النظام التقني.</text:p>
            <text:p/>
            <text:p>**2. التأثير على الاستقرار والموثوقية:**</text:p>
            <text:p>وفقاً لقسم "4.7.4 Success Looks Like"، تعتمد نجاحات التقنية على:</text:p>
            <text:p>* <text:s text:c="2"/>أن تصبح التقنية موثوقة.</text:p>
            <text:p>* أن تصبح الإصدارات قابلة للتنبؤ.</text:p>
            <text:p>* الحفاظ على توفر النظام (System availability).</text:p>
            <text:p>بدون "101"، قد تواجه "باكيت" صعوبات في الحفاظ على هذه المعايير، مما قد يؤدي إلى انقطاعات في الخدمة أو تدهور في الأداء.</text:p>
            <text:p/>
            <text:p>**3. ما تبقى لـ "باكيت" (نقاط القوة والاستمرارية):**</text:p>
            <text:p>من المهم ملاحظة أن "باكيت" تحتفظ بالسيطرة على الجوانب التجارية والمنتج:</text:p>
            <text:p>* <text:s text:c="2"/>تملك "باكيت" استراتيجية المنتج.</text:p>
            <text:p>* <text:s text:c="2"/>تملك "باكيت" العلاقة مع العملاء.</text:p>
            <text:p>* <text:s text:c="2"/>تملك "باكيت" النموذج التشغيلي.</text:p>
            <text:p/>
            <text:p>**الخلاصة:**</text:p>
            <text:p>سيكون الأثر الأكبر على **الجانب التقني والتشغيلي الفني** (البنية التحتية، الكود، الخوادم، والأرشفة)، حيث ستفقد "باكيت" الشريك المسؤول عن جعل التقنية "ميزة تنافسية خفية". ستحتاج "باكيت" إلى إيجاد بديل سريع لتولي مسؤولية الهندسة المعمارية، البنية التحتية، وجودة البرمجيات، أو تطوير كفاءات داخلية فورية، بينما ستستمر في إدارة المنتج والعلاقات مع العملاء بشكل طبيعي.</text:p>
          </table:table-cell>
          <table:table-cell table:number-columns-repeated="16378"/>
        </table:table-row>
        <table:table-row table:style-name="ro3">
          <table:table-cell office:value-type="float" office:value="30" table:style-name="ce12">
            <text:p>30</text:p>
          </table:table-cell>
          <table:table-cell office:value-type="string" table:style-name="ce7">
            <text:p>AI Adoption &amp; Roadmap</text:p>
          </table:table-cell>
          <table:table-cell office:value-type="string" table:style-name="ce7">
            <text:p>What is the recommended first AI pilot for Bakeet, and why was it chosen as the lowest-risk starting point?</text:p>
          </table:table-cell>
          <table:table-cell office:value-type="string" table:style-name="ce7">
            <text:p>The recommended first AI pilot for Bakeet is the **Bakeet Management Report Assistant**.</text:p>
            <text:p/>
            <text:p>It was chosen as the lowest-risk starting point for the following reasons:</text:p>
            <text:p>* <text:s text:c="2"/>**Internal Use:** It is an internal tool, not customer-facing, which limits potential external impact.</text:p>
            <text:p>* <text:s text:c="2"/>**Low-to-Medium Risk:** It falls under the "Medium Risk" category (management reports), requiring human approval but avoiding high-stakes automated decisions like refunds or pricing.</text:p>
            <text:p>* <text:s text:c="2"/>**Measurable Value:** It helps the team understand AI's value by summarizing key metrics (daily orders, sales, active customers, etc.) without exposing the business to unnecessary risk.</text:p>
            <text:p>* <text:s text:c="2"/>**Foundation Building:** It serves as a good foundation for future AI adoption before moving to more complex or customer-facing applications.</text:p>
          </table:table-cell>
          <table:table-cell office:value-type="string" table:style-name="ce8">
            <text:p>ما هو المشروع التجريبي الأول الموصى به للذكاء الاصطناعي في باكيت، ولماذا اختير كنقطة البداية الأقل مخاطرة؟</text:p>
          </table:table-cell>
          <table:table-cell office:value-type="string" table:style-name="ce14">
            <text:p>المشروع التجريبي الأول الموصى به هو **"مساعد تقارير إدارة باكيت" (Bakeet Management Report Assistant)**.</text:p>
            <text:p/>
            <text:p>تم اختيار هذا المشروع كنقطة بداية لأنه:</text:p>
            <text:p/>
            <text:p>1. <text:s/>**داخلي:** لا يواجه العملاء مباشرة، مما يقلل المخاطر.</text:p>
            <text:p>2. <text:s/>**منخفض إلى متوسط المخاطر:** لا يعرض الأعمال لمخاطر غير ضرورية.</text:p>
            <text:p>3. <text:s/>**مفيد للإدارة:** يساعد الفريق على فهم قيمة الذكاء الاصطناعي واتخاذ قرارات أفضل.</text:p>
            <text:p>4. <text:s/>**سهل القياس:** يمكن تقييم نجاحه بسهولة من خلال مقاييس الأداء.</text:p>
            <text:p>5. <text:s/>**مرتبط بأداء الأعمال الحقيقي:** مثل الطلبات اليومية، والمبيعات، ومعدلات التحويل، والإلغاءات، مما يوفر أساساً قوياً قبل الانتقال إلى أدوات الذكاء الاصطناعي الموجهة للعملاء.</text:p>
            <text:p/>
            <text:p>يهدف هذا المشروع إلى مساعدة الفريق على فهم قيمة الذكاء الاصطناعي دون تعريض الأعمال لمخاطر غير ضرورية، مع الحفاظ على المسؤولية النهائية على البشر.</text:p>
          </table:table-cell>
          <table:table-cell table:number-columns-repeated="16378"/>
        </table:table-row>
        <table:table-row table:style-name="ro3">
          <table:table-cell office:value-type="float" office:value="31" table:style-name="ce12">
            <text:p>31</text:p>
          </table:table-cell>
          <table:table-cell office:value-type="string" table:style-name="ce7">
            <text:p>AI Adoption &amp; Roadmap</text:p>
          </table:table-cell>
          <table:table-cell office:value-type="string" table:style-name="ce7">
            <text:p>List the AI use cases proposed for Bakeet, grouped by customer experience, operations, and management.</text:p>
          </table:table-cell>
          <table:table-cell office:value-type="string" table:style-name="ce7">
            <text:p>Based on the provided context, here are the proposed AI use cases for Bakeet, grouped by category:</text:p>
            <text:p/>
            <text:p>**Customer Experience**</text:p>
            <text:p>* <text:s text:c="2"/>**AI Customer Support Assistant:** Helps customers get faster answers about orders, refunds, products, delivery, payments, and complaints (e.g., "Where is my order?", "How can I return this item?").</text:p>
            <text:p>* <text:s text:c="2"/>**AI-enabled loyalty and retention system:** (Mentioned in Context 1).</text:p>
            <text:p>* <text:s text:c="2"/>**Customer lifecycle AI:** (Mentioned in Context 1).</text:p>
            <text:p/>
            <text:p>**Operations**</text:p>
            <text:p>* <text:s text:c="2"/>**Vendor intelligence dashboard:** (Mentioned in Context 1).</text:p>
            <text:p>* <text:s text:c="2"/>**AI-powered marketplace intelligence:** (Mentioned in Context 1).</text:p>
            <text:p>* <text:s text:c="2"/>**Fraud and risk detection:** (Mentioned in Context 3).</text:p>
            <text:p>* <text:s text:c="2"/>**Better inventory and demand insights:** (Mentioned in Context 3).</text:p>
            <text:p/>
            <text:p>**Management**</text:p>
            <text:p>* <text:s text:c="2"/>**AI-assisted management report (First AI Dashboard):** Includes Executive Summary, Daily/Weekly Sales, Number of Orders, etc. (Mentioned in Context 1).</text:p>
            <text:p>* <text:s text:c="2"/>**Faster management reporting:** (Mentioned in Context 3).</text:p>
            <text:p>* <text:s text:c="2"/>**Business decision-making:** Supported by improved operational reporting and vendor performance insights (Mentioned in Context 0 and 3).</text:p>
          </table:table-cell>
          <table:table-cell office:value-type="string" table:style-name="ce8">
            <text:p>اذكر حالات استخدام الذكاء الاصطناعي المقترحة لباكيت، مصنفة حسب: تجربة العملاء، والعمليات، والإدارة.</text:p>
          </table:table-cell>
          <table:table-cell office:value-type="string" table:style-name="ce14">
            <text:p>بناءً على الوثائق المقدمة، إليك حالات استخدام الذكاء الاصطناعي المقترحة لمنصة "باكيت" مصنفة حسب الفئات المطلوبة:</text:p>
            <text:p/>
            <text:p>### 1. تجربة العملاء (Customer Experience)</text:p>
            <text:p>تركز هذه الحالات على تحسين تفاعل العميل المباشر مع المنصة:</text:p>
            <text:p>* <text:s text:c="2"/>**مساعد دعم العملاء بالذكاء الاصطناعي:** تقديم إجابات فورية حول حالة الطلبات، عمليات الإرجاع، المنتجات، التسليم، المدفوعات، والشكاوى.</text:p>
            <text:p><text:s text:c="4"/>* <text:s text:c="2"/>*أمثلة على الأسئلة:* "أين طلبي؟"، "كيف يمكنني إرجاع هذا العنصر؟"، "ما المنتجات المشابهة لهذا؟".</text:p>
            <text:p/>
            <text:p>### 2. العمليات (Operations)</text:p>
            <text:p>تركز هذه الحالات على تحسين الكفاءة الداخلية وإدارة البائعين:</text:p>
            <text:p>* <text:s text:c="2"/>**إعداد وصف المنتجات:** كتابة وصفاً جذاباً ودقيقاً للمنتجات تلقائياً.</text:p>
            <text:p>* <text:s text:c="2"/>*ملاحظة:* يُصنف هذا النشاط ضمن **المخاطر المنخفضة**، ويتطلب مراجعة بشرية أساسية فقط.</text:p>
            <text:p/>
            <text:p>### 3. الإدارة (Management &amp; Strategy)</text:p>
            <text:p>تركز هذه الحالات على دعم اتخاذ القرارات الاستراتيجية والتشغيلية للإدارة العليا:</text:p>
            <text:p>* <text:s text:c="2"/>**مساعد تقارير الإدارة (E-Commerce Management Report Assistant):** تلخيص المبيعات، اتجاهات الطلبات، اتجاهات العملاء، أداء البائعين، مشاكل التوصيل، الشكاوى، نتائج التسويق، والمخاطر التشغيلية.</text:p>
            <text:p>* <text:s text:c="2"/>**تصميم هيكل التقارير:** استخدام أدوات مثل ChatGPT لتصميم هياكل التقارير الاستراتيجية.</text:p>
            <text:p>* <text:s text:c="2"/>*ملاحظة:* يُصنف دعم الإدارة (مثل تقارير الأداء) ضمن **المخاطر المتوسطة**، ويتطلب موافقة بشرية ومراجعة من مدير القسم.</text:p>
            <text:p/>
            <text:p>**ملخص تصنيف المخاطر لحالات الاستخدام المذكورة:**</text:p>
            <text:p>* <text:s text:c="2"/>**مخاطر منخفضة:** إعداد وصف المنتجات، ملخصات الاجتماعات الداخلية، مسودات منشورات وسائل التواصل الاجتماعي.</text:p>
            <text:p>* <text:s text:c="2"/>**مخاطر متوسطة:** مسودات ردود دعم العملاء، اقتراحات حملات التسويق، تقارير الإدارة، ملخصات أداء البائعين.</text:p>
            <text:p>* <text:s text:c="2"/>**مخاطر عالية (غير مذكورة في قائمة الحالات المقترحة ولكن مذكورة في التصنيف):** القرارات التلقائية للإرجاع، العقوبات التلقائية على البائعين، قرارات الائتمان/المدفوعات، تغييرات الأسعار التلقائية.</text:p>
          </table:table-cell>
          <table:table-cell table:number-columns-repeated="16378"/>
        </table:table-row>
        <table:table-row table:style-name="ro2">
          <table:table-cell office:value-type="float" office:value="32" table:style-name="ce12">
            <text:p>32</text:p>
          </table:table-cell>
          <table:table-cell office:value-type="string" table:style-name="ce7">
            <text:p>AI Adoption &amp; Roadmap</text:p>
          </table:table-cell>
          <table:table-cell office:value-type="string" table:style-name="ce7">
            <text:p>What does "Bakeet-izing AI" mean, and what data sources does it combine?</text:p>
          </table:table-cell>
          <table:table-cell office:value-type="string" table:style-name="ce7">
            <text:p>"Bakeet-izing AI" means integrating Bakeet’s specific business context with AI capabilities, rather than relying on generic chatbots. It involves making AI work according to Bakeet’s unique business model, customer behavior, product categories, delivery processes, market knowledge, and operational workflows.</text:p>
            <text:p/>
            <text:p>It combines the following data sources:</text:p>
            <text:p>* <text:s text:c="2"/>Customer data</text:p>
            <text:p>* <text:s text:c="2"/>Product data</text:p>
            <text:p>* <text:s text:c="2"/>Order history</text:p>
            <text:p>* <text:s text:c="2"/>Vendor knowledge</text:p>
            <text:p>* <text:s text:c="2"/>Delivery workflow</text:p>
            <text:p>* <text:s text:c="2"/>Customer-service experience</text:p>
            <text:p>* <text:s text:c="2"/>AI governance</text:p>
          </table:table-cell>
          <table:table-cell office:value-type="string" table:style-name="ce8">
            <text:p>ماذا يعني مصطلح "Bakeet-izing AI"، وما مصادر البيانات التي يجمعها؟</text:p>
          </table:table-cell>
          <table:table-cell office:value-type="string" table:style-name="ce14">
            <text:p>مصطلح **"Bakeet-izing AI"** يعني عدم الاكتفاء باستخدام أدوات ذكاء اصطناعي عامة، بل تكييف الذكاء الاصطناعي ليعمل وفقاً لنموذج عمل "باكيت" وسلوك عملائها وفئات منتجاتها وعمليات التوصيل ومعرفتها بالسوق وسير العمليات التشغيلية الخاصة بها.</text:p>
            <text:p/>
            <text:p>مصادر البيانات التي يجمعها هذا المفهوم هي:</text:p>
            <text:p>1. بيانات العملاء (Customer data)</text:p>
            <text:p>2. بيانات المنتجات (Product data)</text:p>
            <text:p>3. سجل الطلبات (Order history)</text:p>
            <text:p>4. معرفة الموردين (Vendor knowledge)</text:p>
            <text:p>5. سير عمل التوصيل (Delivery workflow)</text:p>
            <text:p>6. تجربة خدمة العملاء (Customer-service experience)</text:p>
            <text:p>7. حوكمة الذكاء الاصطناعي (AI governance)</text:p>
          </table:table-cell>
          <table:table-cell table:number-columns-repeated="16378"/>
        </table:table-row>
        <table:table-row table:style-name="ro3">
          <table:table-cell office:value-type="float" office:value="33" table:style-name="ce12">
            <text:p>33</text:p>
          </table:table-cell>
          <table:table-cell office:value-type="string" table:style-name="ce7">
            <text:p>AI Adoption &amp; Roadmap</text:p>
          </table:table-cell>
          <table:table-cell office:value-type="string" table:style-name="ce7">
            <text:p>What data sources are recommended as safe starting points for AI integration, and which require IT/Legal approval first?</text:p>
          </table:table-cell>
          <table:table-cell office:value-type="string" table:style-name="ce7">
            <text:p>Based on the provided context, the recommended data sources are categorized as follows:</text:p>
            <text:p/>
            <text:p>**Safe Starting Points (Easiest to Integrate)**</text:p>
            <text:p>These are considered low-risk and are the recommended starting points for AI integration:</text:p>
            <text:p>* <text:s text:c="2"/>Company policies</text:p>
            <text:p>* <text:s text:c="2"/>SOPs and procedures</text:p>
            <text:p>* <text:s text:c="2"/>Product catalogs</text:p>
            <text:p>* <text:s text:c="2"/>Service descriptions</text:p>
            <text:p>* <text:s text:c="2"/>HR policies</text:p>
            <text:p>* <text:s text:c="2"/>Legal templates</text:p>
            <text:p/>
            <text:p>**Require IT/Legal Approval (Sensitive Data)**</text:p>
            <text:p>The following data sources **must not** be entered into public AI tools without approval due to sensitivity:</text:p>
            <text:p>* <text:s text:c="2"/>Customer personal information</text:p>
            <text:p>* <text:s text:c="2"/>Phone numbers</text:p>
            <text:p>* <text:s text:c="2"/>Addresses</text:p>
            <text:p>* <text:s text:c="2"/>Payment information</text:p>
            <text:p>* <text:s text:c="2"/>Full order history linked to customer identity</text:p>
            <text:p>* <text:s text:c="2"/>Vendor confidential data</text:p>
            <text:p>* <text:s text:c="2"/>Financial reports</text:p>
            <text:p>* <text:s text:c="2"/>Legal or regulatory documents</text:p>
            <text:p>* <text:s text:c="2"/>Strategic business plans</text:p>
          </table:table-cell>
          <table:table-cell office:value-type="string" table:style-name="ce8">
            <text:p>ما مصادر البيانات الموصى بها كنقاط بداية آمنة لدمج الذكاء الاصطناعي، وأيها يتطلب موافقة تقنية المعلومات والقانونية أولاً؟</text:p>
          </table:table-cell>
          <table:table-cell office:value-type="string" table:style-name="ce14">
            <text:p>بناءً على الوثائق المقدمة، إليك مصادر البيانات الموصى بها كنقاط بداية آمنة، والتي تتطلب موافقة مسبقة:</text:p>
            <text:p/>
            <text:p>### 1. مصادر البيانات الآمنة (نقاط البداية السهلة)</text:p>
            <text:p>هذه المصادر تُعتبر "أسهل نقاط البداية" لأنها غالباً ما تكون معلومات عامة أو داخلية لا تحتوي على بيانات حساسة للعملاء أو معلومات مالية سرية:</text:p>
            <text:p>* <text:s text:c="2"/>سياسات الشركة (Company policies)</text:p>
            <text:p>* <text:s text:c="2"/>الإجراءات واللوائح التشغيلية (SOPs and procedures)</text:p>
            <text:p>* <text:s text:c="2"/>كتالوجات المنتجات (Product catalogs)</text:p>
            <text:p>* <text:s text:c="2"/>وصف الخدمات (Service descriptions)</text:p>
            <text:p>* <text:s text:c="2"/>سياسات الموارد البشرية (HR policies)</text:p>
            <text:p>* <text:s text:c="2"/>القوالب القانونية (Legal templates)</text:p>
            <text:p/>
            <text:p>### 2. المصادر التي تتطلب موافقة تقنية المعلومات والقانونية (أو ممنوعة من الأدوات العامة)</text:p>
            <text:p>تشير الوثائق إلى أن إدخال البيانات التالية في أدوات الذكاء الاصطناعي العامة **يجب ألا يتم دون موافقة**، مما يعني أنها تتطلب مراجعة من أقسام تقنية المعلومات والقانونية أولاً، أو أن استخدامها محظور في الأدوات العامة:</text:p>
            <text:p>* <text:s text:c="2"/>معلومات هوية العملاء الشخصية (Customer personal information)</text:p>
            <text:p>* <text:s text:c="2"/>أرقام الهواتف والعناوين (Phone numbers, Addresses)</text:p>
            <text:p>* <text:s text:c="2"/>معلومات الدفع (Payment information)</text:p>
            <text:p>* <text:s text:c="2"/>سجل الطلبات الكامل المرتبط بهوية العميل (Full order history linked to customer identity)</text:p>
            <text:p>* <text:s text:c="2"/>بيانات الموردين السرية (Vendor confidential data)</text:p>
            <text:p>* <text:s text:c="2"/>التقارير المالية (Financial reports)</text:p>
            <text:p>* <text:s text:c="2"/>الوثائق القانونية أو التنظيمية الحساسة (Legal or regulatory documents)</text:p>
            <text:p>* <text:s text:c="2"/>خطط الأعمال الاستراتيجية (Strategic business plans)</text:p>
            <text:p/>
            <text:p>**الخلاصة:**</text:p>
            <text:p>لبدء مشروع "مساعد تقارير الإدارة" بأمان، يجب البدء بالبيانات **المجهولة (Anonymized)** أو **العينة (Sample data)** من المصادر الداخلية الآمنة (مثل سياسات الشركة وكتالوجات المنتجات)، وتجنب تماماً إدخال البيانات الشخصية أو المالية أو الاستراتيجية الحساسة في أدوات الذكاء الاصطناعي العامة دون موافقات أمنية وقانونية صارمة.</text:p>
          </table:table-cell>
          <table:table-cell table:number-columns-repeated="16378"/>
        </table:table-row>
        <table:table-row table:style-name="ro2">
          <table:table-cell office:value-type="float" office:value="34" table:style-name="ce12">
            <text:p>34</text:p>
          </table:table-cell>
          <table:table-cell office:value-type="string" table:style-name="ce7">
            <text:p>AI Adoption &amp; Roadmap</text:p>
          </table:table-cell>
          <table:table-cell office:value-type="string" table:style-name="ce7">
            <text:p>What questions should Bakeet answer before starting any AI project?</text:p>
          </table:table-cell>
          <table:table-cell office:value-type="string" table:style-name="ce7">
            <text:p>Before starting any AI project, Bakeet should answer the following key questions:</text:p>
            <text:p/>
            <text:p>* <text:s text:c="2"/>What is the biggest manual reporting burden today?</text:p>
            <text:p>* <text:s text:c="2"/>What customer problems repeat the most?</text:p>
            <text:p>* <text:s text:c="2"/>What data is reliable and available?</text:p>
            <text:p>* <text:s text:c="2"/>What data is sensitive and must be protected?</text:p>
            <text:p>* <text:s text:c="2"/>Which AI tool is approved for testing?</text:p>
            <text:p>* <text:s text:c="2"/>Who will review AI outputs?</text:p>
            <text:p>* <text:s text:c="2"/>Which use case can create value in 90 days?</text:p>
            <text:p>* <text:s text:c="2"/>What should AI never do without human approval?</text:p>
            <text:p>* <text:s text:c="2"/>What success metric will prove the pilot is useful?</text:p>
            <text:p>* <text:s text:c="2"/>What use case should come after the first pilot?</text:p>
          </table:table-cell>
          <table:table-cell office:value-type="string" table:style-name="ce8">
            <text:p>ما الأسئلة التي يجب أن تجيب عنها باكيت قبل البدء بأي مشروع ذكاء اصطناعي؟</text:p>
          </table:table-cell>
          <table:table-cell office:value-type="string" table:style-name="ce14">
            <text:p>بناءً على الوثيقة، يجب على "باكيت" الإجابة على الأسئلة العشرة التالية قبل البدء بأي مشروع للذكاء الاصطناعي:</text:p>
            <text:p/>
            <text:p>1. ما هو أكبر عبء للتقرير اليدوي الحالي؟</text:p>
            <text:p>2. ما هي مشاكل العملاء التي تتكرر أكثر من غيرها؟</text:p>
            <text:p>3. ما هي البيانات الموثوقة والمتاحة؟</text:p>
            <text:p>4. ما هي البيانات الحساسة التي يجب حمايتها؟</text:p>
            <text:p>5. أي أداة ذكاء اصطناعي معتمدة للاختبار؟</text:p>
            <text:p>6. من سيراجع مخرجات الذكاء الاصطناعي؟</text:p>
            <text:p>7. أي حالة استخدام يمكنها خلق قيمة خلال 90 يوماً؟</text:p>
            <text:p>8. ماذا يجب ألا يفعله الذكاء الاصطناعي أبداً دون موافقة بشرية؟</text:p>
            <text:p>9. ما مقياس النجاح الذي سيثبت أن المشروع التجريبي مفيد؟</text:p>
            <text:p>10. أي حالة استخدام يجب أن تأتي بعد المشروع التجريبي الأول؟</text:p>
          </table:table-cell>
          <table:table-cell table:number-columns-repeated="16378"/>
        </table:table-row>
        <table:table-row table:style-name="ro4">
          <table:table-cell office:value-type="float" office:value="35" table:style-name="ce12">
            <text:p>35</text:p>
          </table:table-cell>
          <table:table-cell office:value-type="string" table:style-name="ce7">
            <text:p>Cross-Document Synthesis</text:p>
          </table:table-cell>
          <table:table-cell office:value-type="string" table:style-name="ce7">
            <text:p>Map each AI use case from the GenAI guide to the Bakeet business unit that should own it according to the Bakeet Operating System.</text:p>
          </table:table-cell>
          <table:table-cell office:value-type="string" table:style-name="ce7">
            <text:p>Based on the provided context, a direct mapping cannot be fully completed because the **Bakeet Operating System** document (which defines the specific business units and their ownership responsibilities) is not included in the provided context.</text:p>
            <text:p/>
            <text:p>However, based on **Context 2**, we know that the **Social Commerce Business Unit** owns Bakeet-owned brands, product portfolios, content strategy, merchandising, and sales performance. The other business units are not defined in the provided text.</text:p>
            <text:p/>
            <text:p>Below is a logical inference of ownership based on standard e-commerce roles and the limited information available in **Context 2** and **Context 3**:</text:p>
            <text:p/>
            <text:p>### AI Use Cases from GenAI Guide (Context 3) &amp; Inferred Ownership</text:p>
            <text:p/>
            <text:p>**Stage 1: Internal Productivity**</text:p>
            <text:p>* <text:s text:c="2"/>**Management Report Assistant:** *Operations Lead / Executive Team* (General operational oversight)</text:p>
            <text:p>* <text:s text:c="2"/>**Marketing Content Assistant:** *Social Commerce Business Unit* (Context 2 states this unit is responsible for **content production** and **campaign execution**)</text:p>
            <text:p>* <text:s text:c="2"/>**Meeting Summary Assistant:** *General Management / All Leads* (Internal administrative support)</text:p>
            <text:p>* <text:s text:c="2"/>**Internal Knowledge Assistant:** *Technology Lead / HR / Operations* (Internal information management)</text:p>
            <text:p/>
            <text:p>**Stage 2: Customer and Vendor Support**</text:p>
            <text:p>* <text:s text:c="2"/>**Customer Support Assistant:** *Customer Support Lead* (Direct customer engagement is also mentioned in Context 2 as part of Social Commerce, but typically falls under a dedicated Support function)</text:p>
            <text:p>* <text:s text:c="2"/>**Vendor Performance Assistant:** *Operations Lead / Vendor Management* (Context 2 mentions "import coordination" and "inventory management" under Social Commerce, but vendor performance is often broader)</text:p>
            <text:p>* <text:s text:c="2"/>**Complaint Analyzer:** *Customer Support Lead / Legal-Compliance* (Handling disputes and complaints)</text:p>
            <text:p>* <text:s text:c="2"/>**Delivery Risk Assistant:** *Operations Lead / Logistics* (Supply chain and fulfillment)</text:p>
            <text:p/>
            <text:p>**Stage 3: Revenue Growth**</text:p>
            <text:p>* <text:s text:c="2"/>**Product Recommendation Engine:** *Social Commerce Business Unit* (Context 2 states this unit owns **product portfolios** and **merchandising**)</text:p>
            <text:p>* <text:s text:c="2"/>**Smart Search:** *Technology Lead / Product Manager* (Platform functionality)</text:p>
            <text:p>* <text:s text:c="2"/>**Personalized promotions:** *Social Commerce Business Unit* (Context 2 states this unit is responsible for **campaign execution** and **sales performance**)</text:p>
            <text:p>* <text:s text:c="2"/>**Demand forecasting:** *Operations Lead / Finance / Social Commerce Business Unit* (Links to **inventory management** and **sourcing** mentioned in Context 2)</text:p>
            <text:p/>
            <text:p>**Stage 4: Strategic AI Capability**</text:p>
            <text:p>* <text:s text:c="2"/>**Private AI layer connected to Bakeet data:** *Technology Lead / Data / BI* (Infrastructure and data security)</text:p>
            <text:p>* <text:s text:c="2"/>**AI-powered marketplace intelligence:** *CEO / Founder / Product Manager* (Strategic oversight)</text:p>
            <text:p>* <text:s text:c="2"/>**Vendor intelligence dashboard:** *Operations Lead / Vendor Management*</text:p>
            <text:p>* <text:s text:c="2"/>**Customer lifecycle AI:** *Marketing Lead / Customer Support Lead / Social Commerce Business Unit* (Customer engagement and retention)</text:p>
            <text:p/>
            <text:p>### Key Takeaway</text:p>
            <text:p>According to **Context 2**, the **Social Commerce Business Unit** is a critical owner for AI use cases related to:</text:p>
            <text:p>* <text:s text:c="2"/>Content production</text:p>
            <text:p>* <text:s text:c="2"/>Campaign execution</text:p>
            <text:p>* <text:s text:c="2"/>Product portfolios/Merchandising</text:p>
            <text:p>* <text:s text:c="2"/>Direct customer engagement</text:p>
            <text:p>* <text:s text:c="2"/>Sales performance</text:p>
            <text:p/>
            <text:p>For a precise mapping, the full **Bakeet Operating System** document is required to define the other business units and their exact responsibilities.</text:p>
          </table:table-cell>
          <table:table-cell office:value-type="string" table:style-name="ce8">
            <text:p>اربط كل حالة استخدام للذكاء الاصطناعي من دليل الذكاء الاصطناعي التوليدي بوحدة الأعمال في باكيت التي يجب أن تمتلكها وفقاً لنظام التشغيل الخاص بباكيت.</text:p>
          </table:table-cell>
          <table:table-cell office:value-type="string" table:style-name="ce14">
            <text:p>بناءً على الوثائق المقدمة، لا يحتوي النص على "دليل الذكاء الاصطناعي التوليدي" منفصل يحدد حالات استخدام محددة (Use Cases) مع اسمائها بدقة. ومع ذلك، يشير **Context 2** إلى وجود مجموعة عمل للذكاء الاصطناعي (AI Working Group) ومخطط لوحة معلومات أولي، بينما يحدد **Context 0**، **Context 1**، و **Context 3** وحدات الأعمال الرئيسية في نظام تشغيل باكيت.</text:p>
            <text:p/>
            <text:p>لربط حالات استخدام الذكاء الاصطناعي المحتملة (المستنتجة من سياق الذكاء الاصطناعي في Context 2 والنصوص الأخرى) بوحدات الأعمال التي يجب أن تملكها أو تقودها، يمكننا الاستناد إلى المبادئ التالية المذكورة في النص:</text:p>
            <text:p>1. <text:s/>**المبدأ العام (Context 1):** "One Company. One Operating System" - جميع التفاعلات تساهم في هدف واحد.</text:p>
            <text:p>2. <text:s/>**التملك (Ownership):** كل وحدة أعمال تملك نطاقها المحدد (المنصة، التجارة الاجتماعية، العمليات).</text:p>
            <text:p/>
            <text:p>فيما يلي ربط مقترح لحالات استخدام الذكاء الاصطناعي الشائعة في منصات التجارة الإلكترونية (كما هو مذكور بشكل عام في Context 2 مثل "Vendor intelligence", "Customer lifecycle AI") بوحدات الأعمال المسؤولة عنها وفقاً للهيكل المذكور:</text:p>
            <text:p/>
            <text:p>### 1. وحدة منصة التجارة الإلكترونية (Commerce Platform)</text:p>
            <text:p>* <text:s text:c="2"/>**المسؤولية (Context 3):** إدارة تجربة العميل الرقمية، تحليلات التاجر، دعم العملاء، إدارة الطلبات، وتحسين قابلية استخدام المنصة.</text:p>
            <text:p>* <text:s text:c="2"/>**حالات استخدام الذكاء الاصطناعي المرتبطة بها:**</text:p>
            <text:p><text:s text:c="4"/>* <text:s text:c="2"/>**تحليلات التاجر المدعومة بالذكاء الاصطناعي (Merchant Analytics AI):** تحسين تجربة التاجر من خلال رؤى ذكية حول الأداء.</text:p>
            <text:p><text:s text:c="4"/>* <text:s text:c="2"/>**دعم العملاء الذكي (AI Customer Support):** chatbots أو أنظمة رد تلقائي ذكية لتحسين تجربة العميل والدعم الفني.</text:p>
            <text:p><text:s text:c="4"/>* <text:s text:c="2"/>**تحسين تجربة التصفح والبحث (Search &amp; Discovery AI):** تحسين جودة كتالوج المنتجات وتجربة التسوق للعميل.</text:p>
            <text:p/>
            <text:p>### 2. وحدة الأعمال للتجارة الاجتماعية (Social Commerce Business Unit)</text:p>
            <text:p>* <text:s text:c="2"/>**المسؤولية (Context 0 &amp; 1):** إدارة المنتجات والعلامات التجارية الخاصة بباكيت، إنتاج المحتوى، الحملات التسويقية، التفاعل المباشر مع العملاء، وبيع المنتجات عبر القنوات الاجتماعية.</text:p>
            <text:p>* <text:s text:c="2"/>**حالات استخدام الذكاء الاصطناعي المرتبطة بها:**</text:p>
            <text:p><text:s text:c="4"/>* <text:s text:c="2"/>**إنتاج المحتوى المدعوم بالذكاء الاصطناعي (AI Content Production):** إنشاء صور، نصوص إعلانية، ومحتوى تسويقي للعلامات التجارية الخاصة بباكيت.</text:p>
            <text:p><text:s text:c="4"/>* <text:s text:c="2"/>**تحسين أداء الحملات (Campaign Optimization AI):** تحليل أداء الحملات التسويقية وتعديلها تلقائياً لزيادة المبيعات.</text:p>
            <text:p><text:s text:c="4"/>* <text:s text:c="2"/>**التفاعل المباشر مع العملاء عبر السوشيال ميديا (Social Engagement AI):** أتمتة الردود والتحليلات في منصات التواصل الاجتماعي لزيادة التفاعل والمبيعات.</text:p>
            <text:p/>
            <text:p>### 3. مجموعة عمل الذكاء الاصطناعي (AI Working Group) - كجهة تنسيقية وتشغيلية</text:p>
            <text:p>* <text:s text:c="2"/>**المسؤولية (Context 2):** اختيار حالات استخدام الذكاء الاصطناعي، الموافقة على قواعد البيانات، مراجعة المخاطر، اختبار النماذج الأولية (Pilots)، وقرر ما يجب توسيع نطاقه.</text:p>
            <text:p>* <text:s text:c="2"/>**حالات استخدام الذكاء الاصطناعي المرتبطة بها:**</text:p>
            <text:p><text:s text:c="4"/>* <text:s text:c="2"/>**لوحة بيانات ذكاء البائعين (Vendor Intelligence Dashboard):** تطوير وصيانة هذه الأداة لضمان دقة البيانات وقابليتها للاستخدام عبر الوحدات المختلفة.</text:p>
            <text:p><text:s text:c="4"/>* <text:s text:c="2"/>**نظام الولاء والاحتفاظ بالعملاء المدعوم بالذكاء الاصطناعي (AI-enabled loyalty and retention system):** تطوير هذا النظام بالتعاون مع وحدات التسويق وخدمة العملاء لضمان فعالية برامج الولاء.</text:p>
            <text:p><text:s text:c="4"/>* <text:s text:c="2"/>**ذكاء دورة حياة العميل (Customer lifecycle AI):** إدارة رحلة العميل من مرحلة الاكتساب إلى الاحتفاظ به، عبر تنسيق البيانات بين المنصة والتجارة الاجتماعية.</text:p>
            <text:p/>
            <text:p>### خلاصة الربط حسب مبدأ "التملك" في نظام تشغيل باكيت:</text:p>
            <text:p/>
            <text:p>| حالة استخدام الذكاء الاصطناعي | وحدة الأعمال المسؤولة عن التملك/التنفيذ | السبب/المرجع من النص |</text:p>
            <text:p>| :--- | :--- | :--- |</text:p>
            <text:p>| **تحليلات التاجر ودعم العملاء** | **Commerce Platform** (وحدة منصة التجارة الإلكترونية) | تملك "تجربة العميل الرقمية" و"تحليلات التاجر" و"دعم العملاء" (Context 3). |</text:p>
            <text:p>| **إنتاج المحتوى والتسويق** | **Social Commerce Business Unit** (وحدة التجارة الاجتماعية) | تملك "استراتيجية المحتوى" ومسؤولة عن "إنتاج المحتوى" و"الحملات" (Context 0). |</text:p>
            <text:p>| **ذكاء البائعين (Vendor Intelligence)** | **AI Working Group** (بالتنسيق مع Commerce Platform) | ذكرت كجزء من لوحة المعلومات المقترحة، وتتطلب تنسيقاً بين البيانات والتقنية (Context 2). |</text:p>
            <text:p>| **الولاء والاحتفاظ بالعملاء** | **AI Working Group** (بالتنسيق مع Social Commerce &amp; Commerce Platform) | تتطلب دمج بيانات التفاعل (Social) مع بيانات المعاملات (Platform) تحت إشراف مجموعة العمل (Context 2). |</text:p>
            <text:p/>
            <text:p>**ملاحظة هامة:** يوضح **Context 1** أن هذه الوحدات "لا تعمل بشكل مستقل" وأن كل تفاعل يساهم في هدف واحد. لذلك، بينما تملك كل وحدة نطاقها الخاص، فإن تنفيذ حلول الذكاء الاصطناعي يتطلب تعاوناً وثيقاً عبر **مجموعة عمل الذكاء الاصطناعي** المقترحة في **Context 2** لضمان التكامل داخل "نظام التشغيل الواحد" لباكيت.</text:p>
          </table:table-cell>
          <table:table-cell table:number-columns-repeated="16378"/>
        </table:table-row>
        <table:table-row table:style-name="ro4">
          <table:table-cell office:value-type="float" office:value="36" table:style-name="ce12">
            <text:p>36</text:p>
          </table:table-cell>
          <table:table-cell office:value-type="string" table:style-name="ce7">
            <text:p>Cross-Document Synthesis</text:p>
          </table:table-cell>
          <table:table-cell office:value-type="string" table:style-name="ce7">
            <text:p>The Bakeet Book says the Maestro Office monitors company-wide KPIs. How could the "Management Report Assistant" from the GenAI guide support the Maestro Office's mission?</text:p>
          </table:table-cell>
          <table:table-cell office:value-type="string" table:style-name="ce7">
            <text:p>Based on the provided context, the **Management Report Assistant** would support the Maestro Office’s mission by automating and enhancing the specific responsibilities outlined in **Context 0**, **Context 1**, and **Context 2**.</text:p>
            <text:p/>
            <text:p>Here is how the "Management Report Assistant" directly supports the Maestro Office’s mission to "Ensure that Bakeet operates as one company":</text:p>
            <text:p/>
            <text:p>### 1. Maintaining Organizational Transparency and Visibility</text:p>
            <text:p>* <text:s text:c="2"/>**Context Reference:** Context 1 states the Maestro Office "owns operational visibility" and provides leadership with a "clear understanding of how the company is performing." Context 2 notes it prepares "executive dashboards, operational reports, and performance reviews."</text:p>
            <text:p>* <text:s text:c="2"/>**Support:** The Management Report Assistant can automatically aggregate data from various departments to generate these executive dashboards and operational reports in real-time, ensuring leadership has accurate, up-to-date information without manual compilation.</text:p>
            <text:p/>
            <text:p>### 2. Monitoring Company-Wide KPIs</text:p>
            <text:p>* <text:s text:c="2"/>**Context Reference:** Context 0 states that "Every company-wide KPI is monitored through the Maestro Office." Context 2 adds that the Maestro Office "owns company-wide KPI governance."</text:p>
            <text:p>* <text:s text:c="2"/>**Support:** The assistant can continuously track KPIs across all business units, flagging deviations or trends automatically. This ensures that KPI monitoring is consistent, comprehensive, and integrated into the "operational rhythm" mentioned in Context 0.</text:p>
            <text:p/>
            <text:p>### 3. Ensuring Strategic Alignment and Execution Follow-up</text:p>
            <text:p>* <text:s text:c="2"/>**Context Reference:** Context 0 mentions the Maestro Office tracks "strategic initiatives" and ensures "execution remains aligned with strategic priorities." Context 1 states its role is to "translate strategy into execution."</text:p>
            <text:p>* <text:s text:c="2"/>**Support:** The assistant can summarize the status of strategic initiatives from various departments into unified management reports. This allows the Maestro Office to quickly identify if initiatives are "moving forward without unnecessary delay" (as noted in Context 3) and if they remain aligned with the company’s overall direction.</text:p>
            <text:p/>
            <text:p>### 4. Facilitating Executive Decision-Making</text:p>
            <text:p>* <text:s text:c="2"/>**Context Reference:** Context 1 notes that the Maestro Office identifies "which initiatives require executive attention." Context 3 states the Maestro Office succeeds when "Leadership has accurate information."</text:p>
            <text:p>* <text:s text:c="2"/>**Support:** By synthesizing complex operational data into clear, concise management reports, the assistant ensures that executives receive the precise information needed to resolve "cross-functional issues" (Context 0) and make informed decisions, thereby reducing delays and improving operational predictability.</text:p>
            <text:p/>
            <text:p>In essence, the **Management Report Assistant** acts as a force multiplier for the Maestro Office, automating the data aggregation and reporting processes that are central to its role as the "organization's operational command center" (Context 1).</text:p>
          </table:table-cell>
          <table:table-cell office:value-type="string" table:style-name="ce8">
            <text:p>تذكر وثيقة باكيت أن مكتب المايسترو يراقب مؤشرات الأداء على مستوى الشركة. كيف يمكن لـ"مساعد التقارير الإدارية" من دليل الذكاء الاصطناعي أن يدعم مهمة مكتب المايسترو؟</text:p>
          </table:table-cell>
          <table:table-cell office:value-type="string" table:style-name="ce14">
            <text:p>بناءً على سياق وثيقة "باكيت" (Bakeet) والمعلومات المقدمة حول دور **مكتب المايسترو (Maestro Office)**، يمكن لـ **"مساعد التقارير الإدارية" (Executive Reporting Assistant)** المدعوم بالذكاء الاصطناعي أن يدعم مهمة المكتب بشكل جوهري من خلال تعزيز قدراته في الرقابة والتنسيق، وذلك بالطرق التالية:</text:p>
            <text:p/>
            <text:p>**1. أتمتة إعداد لوحات المعلومات التنفيذية (Executive Dashboards):**</text:p>
            <text:p>* <text:s text:c="2"/>**السياق من النص:** يذكر **Context 0** أن المكتب يحافظ على الشفافية التنظيمية من خلال إعداد "لوحات معلومات تنفيذية" و"تقارير تشغيلية".</text:p>
            <text:p>* <text:s text:c="2"/>**الدعم:** يمكن لمساعد التقارير الإدارية جمع البيانات من مختلف الوحدات التجارية (التجارة الاجتماعية، منصة التجارة، العمليات) ومعالجتها تلقائياً لإنشاء لوحات معلومات حية ودقيقة في الوقت الفعلي. هذا يقلل من الجهد اليدوي ويضمن أن القيادة العليا تتلقى معلومات محدثة باستمرار، مما يعزز "الرؤية التنظيمية" التي يملكها المكتب (Context 0).</text:p>
            <text:p/>
            <text:p>**2. مراقبة مؤشرات الأداء الرئيسية على مستوى الشركة (Company-wide KPIs):**</text:p>
            <text:p>* <text:s text:c="2"/>**السياق من النص:** يوضح **Context 0** أن المكتب يملك "حوكمة مؤشرات الأداء الرئيسية على مستوى الشركة"، و**Context 2** يؤكد أن "كل مؤشر أداء رئيسي على مستوى الشركة يُراقب من خلال مكتب المايسترو".</text:p>
            <text:p>* <text:s text:c="2"/>**الدعم:** يمكن للمساعد الذكي مراقبة مؤشرات الأداء الرئيسية (KPIs) بشكل استباقي، وتحديد الانحرافات عن الأهداف، وإبراز الاتجاهات الناشئة. هذا يسمح للمكتب بالتحقق من أن "التنفيذ يظل متوافقاً مع الأولويات الاستراتيجية" (Context 0) بسرعة ودقة أكبر.</text:p>
            <text:p/>
            <text:p>**3. تسريع اتخاذ القرار عبر رؤى استباقية:**</text:p>
            <text:p>* <text:s text:c="2"/>**السياق من النص:** يهدف المكتب إلى "إزالة العقبات التشغيلية" و"ضمان تحرك الجميع في نفس الاتجاه" (Context 1).</text:p>
            <text:p>* <text:s text:c="2"/>**الدعم:** بدلاً من مجرد عرض البيانات، يمكن للمساعد تقديم رؤى تحليلية (Insights) توضح سبب حدوث انحراف في الأداء أو bottleneck (عنق زجاجة). هذا يدعم مهمة المكتب في تحويل الاستراتيجية إلى تنفيذ فعلي ومراقبة الأداء، كما هو مذكور في **Context 1**.</text:p>
            <text:p/>
            <text:p>**4. ضمان دقة المعلومات للقيادة:**</text:p>
            <text:p>* <text:s text:c="2"/>**السياق من النص:** يحدد **Context 3** أن نجاح المكتب يتحقق عندما "تكون القيادة لديها معلومات دقيقة".</text:p>
            <text:p>* <text:s text:c="2"/>**الدعم:** يقلل الذكاء الاصطناعي من الأخطاء البشرية في تجميع البيانات ويوفر مصدرًا واحدًا للحقيقة (Single Source of Truth)، مما يضمن أن جميع القرارات التنفيذية مبنية على بيانات موثوقة ومتسقة عبر جميع الأقسام.</text:p>
            <text:p/>
            <text:p>**الخلاصة:**</text:p>
            <text:p>يعمل "مساعد التقارير الإدارية" كـ **أداة تمكينية قوية** لمكتب المايسترو، حيث يحول دوره من جمع يدوي للبيانات إلى **تحليل استراتيجي ورقابة ذكية**، مما يعزز كفاءة المكتب في تحقيق هدفه الأساسي: "ضمان عمل باكيت كشركة واحدة، وليس كأقسام مستقلة" (Context 2).</text:p>
          </table:table-cell>
          <table:table-cell table:number-columns-repeated="16378"/>
        </table:table-row>
        <table:table-row table:style-name="ro5">
          <table:table-cell office:value-type="float" office:value="37" table:style-name="ce12">
            <text:p>37</text:p>
          </table:table-cell>
          <table:table-cell office:value-type="string" table:style-name="ce7">
            <text:p>Cross-Document Synthesis</text:p>
          </table:table-cell>
          <table:table-cell office:value-type="string" table:style-name="ce7">
            <text:p>Bakeet's philosophy says every capability must "reduce complexity, never increase it." Evaluate the proposed AI use cases against this principle — which ones fit best, and which could add complexity?</text:p>
          </table:table-cell>
          <table:table-cell office:value-type="string" table:style-name="ce7">
            <text:p>Based on the Bakeet Operating System philosophy that **"every capability should reduce complexity, never increase it,"** here is an evaluation of the proposed AI use cases.</text:p>
            <text:p/>
            <text:p>### ✅ Use Cases That Fit Best (Reduce Complexity)</text:p>
            <text:p>These use cases directly simplify operations, automate manual labor, or provide clarity, aligning with the principle of reducing complexity.</text:p>
            <text:p/>
            <text:p>1. <text:s/>**Management Report Assistant**</text:p>
            <text:p><text:s text:c="4"/>* <text:s text:c="2"/>**Why it fits:** It aggregates data from siloed departments into unified insights. Instead of manual data compilation and cross-departmental coordination to get a status update, the assistant provides a single source of truth. This reduces the complexity of *operational visibility*.</text:p>
            <text:p>2. <text:s/>**Internal Knowledge Assistant**</text:p>
            <text:p><text:s text:c="4"/>* <text:s text:c="2"/>**Why it fits:** It centralizes SOPs, policies, and procedures. Instead of employees searching through disparate files or asking colleagues for basic information, they get instant answers. This reduces the complexity of *internal navigation and onboarding*.</text:p>
            <text:p>3. <text:s/>**Customer Support Assistant**</text:p>
            <text:p><text:s text:c="4"/>* <text:s text:c="2"/>**Why it fits:** It handles routine inquiries automatically. This reduces the complexity of *customer engagement* by filtering out simple issues, allowing human agents to focus on complex problems without being bogged down by volume.</text:p>
            <text:p>4. <text:s/>**Vendor Performance Assistant**</text:p>
            <text:p><text:s text:c="4"/>* <text:s text:c="2"/>**Why it fits:** It automates the monitoring of vendor metrics. Instead of manually tracking scores and compliance across hundreds of vendors, the system flags issues. This reduces the complexity of *vendor management*.</text:p>
            <text:p/>
            <text:p>### ⚠️ Use Cases That Could Add Complexity (Risks)</text:p>
            <text:p>These use cases, if not implemented with strict governance, could introduce new layers of complexity, such as "black box" decision-making, data integration overhead, or misalignment with human judgment.</text:p>
            <text:p/>
            <text:p>1. <text:s/>**Product Recommendation Engine**</text:p>
            <text:p><text:s text:c="4"/>* <text:s text:c="2"/>**Risk:** If the AI recommendations do not align with Bakeet’s specific business model or customer behavior (as warned in Context 2), it could create a fragmented user experience. Adding a layer of algorithmic curation on top of human merchandising can increase complexity if the two systems are not perfectly integrated.</text:p>
            <text:p><text:s text:c="4"/>* <text:s text:c="2"/>**Mitigation:** Must be "Bakeet-ized" (Context 2) and supervised by the Social Commerce Business Unit to ensure it simplifies the *customer journey*, not complicates it.</text:p>
            <text:p>2. <text:s/>**Smart Search**</text:p>
            <text:p><text:s text:c="4"/>* <text:s text:c="2"/>**Risk:** Implementing AI-driven search requires significant data integration and tuning. If the search results are inaccurate, customers may spend *more* time finding products, increasing complexity for the user.</text:p>
            <text:p><text:s text:c="4"/>* <text:s text:c="2"/>**Mitigation:** Should be introduced gradually (as per the 90-day pilot in Context 1) to ensure it actually simplifies product discovery.</text:p>
            <text:p>3. <text:s/>**Demand Forecasting**</text:p>
            <text:p><text:s text:c="4"/>* <text:s text:c="2"/>**Risk:** AI predictions can be complex to interpret and act upon. If operations teams don’t trust the AI’s forecasts, they may ignore them or try to override them manually, creating a dual-system complexity.</text:p>
            <text:p><text:s text:c="4"/>* <text:s text:c="2"/>**Mitigation:** Must provide clear, actionable insights rather than just raw data, ensuring it simplifies *inventory management* decisions.</text:p>
            <text:p>4. <text:s/>**Private AI Layer / AI-Powered Marketplace Intelligence**</text:p>
            <text:p><text:s text:c="4"/>* <text:s text:c="2"/>**Risk:** Building and maintaining a private AI infrastructure adds technical complexity. If not managed by a dedicated team (Technology Lead/Data), it could become a siloed "isolated tool" rather than an integrated capability (violating Context 0’s principle).</text:p>
            <text:p><text:s text:c="4"/>* <text:s text:c="2"/>**Mitigation:** Must be viewed as an integrated capability, not a standalone product, and governed by clear ownership (Context 2).</text:p>
            <text:p/>
            <text:p>### 📌 Key Principle for Evaluation</text:p>
            <text:p>According to **Context 0**, the test for any AI use case is:</text:p>
            <text:p>* <text:s text:c="2"/>**Does it integrate with the ecosystem?** (e.g., Does the Management Report Assistant pull from all departments seamlessly?)</text:p>
            <text:p>* <text:s text:c="2"/>**Does it improve the merchant/customer experience?** (e.g., Does Smart Search make it easier to find products?)</text:p>
            <text:p>* <text:s text:c="2"/>**Does it optimize one department at the expense of the entire organization?** (e.g., Does Demand Forecasting help Inventory but hurt Sales?)</text:p>
            <text:p/>
            <text:p>**Conclusion:** The use cases that **automate manual tasks** (Reporting, Knowledge, Support) are the strongest fits for reducing complexity. The use cases that **alter decision-making** (Recommendations, Forecasting, Search) require careful integration and human oversight to ensure they simplify, rather than complicate, the user and operational experience.</text:p>
          </table:table-cell>
          <table:table-cell office:value-type="string" table:style-name="ce8">
            <text:p>تنص فلسفة باكيت على أن كل قدرة يجب أن "تقلل التعقيد ولا تزيده أبداً". قيّم حالات استخدام الذكاء الاصطناعي المقترحة وفق هذا المبدأ — أيها الأكثر انسجاماً معه، وأيها قد يضيف تعقيداً؟</text:p>
          </table:table-cell>
          <table:table-cell office:value-type="string" table:style-name="ce14">
            <text:p>بناءً على فلسفة باكيت الجوهرية المذكورة في **Context 0** و **Context 1**، والتي تنص على أن "كل قدرة يجب أن تقلل التعقيد ولا تزيده أبداً"، وأن التكنولوجيا يجب أن "تمكّن التجارة بصمت" وأن "تكون البساطة هي تجربة العميل/التاجر"، إليك تقييم لحالات استخدام الذكاء الاصطناعي المقترحة (بناءً على السياق السابق):</text:p>
            <text:p/>
            <text:p>### 1. الحالات الأكثر انسجاماً مع المبدأ (تقلل التعقيد وتزيد البساطة)</text:p>
            <text:p/>
            <text:p>هذه الحالات تخدم مباشرة هدف "إزالة الحواجز التشغيلية" و"جعل العمليات قابلة للتكرار":</text:p>
            <text:p/>
            <text:p>* <text:s text:c="2"/>**مساعد التقارير الإدارية (Executive Reporting Assistant) لمكتب المايسترو:**</text:p>
            <text:p><text:s text:c="4"/>* <text:s text:c="2"/>**السبب:** يزيل هذا الحل التعقيد المتعلق بجمع البيانات المبعثرة من وحدات متعددة. بدلاً من أن يقضي المدراء وقتهم في مزامنة الجداول وإصلاح الأخطاء، يحصلون على رؤية موحدة ودقيقة ("Source of Truth"). هذا يتوافق مع مبدأ **Context 0** بأن "كل قرار تشغيلي يجب أن يحسن تجربة التاجر... وليس تحسين قسم واحد على حساب المنظمة". فهو يوحّد الرؤية ويقلل التعقيد الإداري.</text:p>
            <text:p>* <text:s text:c="2"/>**دعم العملاء الذكي (AI Customer Support) داخل منصة التجارة الإلكترونية:**</text:p>
            <text:p><text:s text:c="4"/>* <text:s text:c="2"/>**السبب:** يتوافق مع **Context 1** الذي ينص على: "التكنولوجيا يجب ألا تصبح مشكلة أخرى... بل يجب أن تمكّن التجارة بصمت". الرد الآلي الذكي يحل المشكلات الروتينية بسرعة، مما يحرر التاجر من التعقيد في إدارة الاستفسارات المتكررة، ويجعل "خدمة العملاء" أكثر سلاسة وسرعة، وهو ما يصب في هدف "تبسيط التجارة".</text:p>
            <text:p>* <text:s text:c="2"/>**تحسين تجربة البحث والتصفح (Search &amp; Discovery AI):**</text:p>
            <text:p><text:s text:c="4"/>* <text:s text:c="2"/>**السبب:** يقلل هذا الحل التعقيد الذي يواجهه العميل عند البحث عن منتج. بدلاً من التصفية اليدوية المعقدة، يفهم النظام نية العميل ويقدم النتائج بدقة. هذا يعزز مبدأ "كل قدرة داخل باكيت موجودة لسبب واحد: تبسيط التجارة" (**Context 2**).</text:p>
            <text:p/>
            <text:p>### 2. الحالات التي قد تضيف تعقيداً (إذا لم تُنفذ بحكمة)</text:p>
            <text:p/>
            <text:p>هذه الحالات قد تنتهك المبدأ إذا تحولت من "أداة تمكين" إلى "مصدر عبء" أو "عزل":</text:p>
            <text:p/>
            <text:p>* <text:s text:c="2"/>**إنشاء محتوى تسويقي معقد جداً أو متعدد الطبقات (Over-automated Content Generation):**</text:p>
            <text:p><text:s text:c="4"/>* <text:s text:c="2"/>**المخاطر:** إذا أنتج الذكاء الاصطناعي محتوى لا يتناسب مع نغمة العلامة التجارية الدقيقة أو يتطلب تدقيقاً بشرياً مكثفاً لتصحيحه، فإنه يضيف "عبئاً تشغيلياً" للتاجر أو فريق التسويق. هذا ينتهك مبدأ **Context 1** بأن "التكنولوجيا يجب ألا تصبح مشكلة أخرى". التعقيد هنا يظهر في "جودة المخرجات" التي تتطلب جهداً إضافياً للمراجعة بدلاً من كونها جاهزة للاستخدام الفوري.</text:p>
            <text:p>* <text:s text:c="2"/>**أنظمة ولاء معقدة جداً تعتمد على خوارزميات غير شفافة (Black-box Loyalty Systems):**</text:p>
            <text:p><text:s text:c="4"/>* <text:s text:c="2"/>**المخاطر:** إذا كانت قواعد المكافآت أو التفاعلات المدعومة بالذكاء الاصطناعي غير مفهومة للتاجر أو العميل، فإنها تخلق "غموضاً" بدلاً من "الثقة". **Context 1** يذكر أن "التاجر يجب أن يشعر بالثقة" وأن "العمليات يجب أن تكون قابلة للتكرار". النظام المعقد الذي لا يمكن تفسيره يضيف تعقيداً نفسياً وتشغيلياً، مما يتعارض مع هدف "البساطة".</text:p>
            <text:p>* <text:s text:c="2"/>**الاعتماد الكلي على الذكاء الاصطناعي في اتخاذ القرارات الاستراتيجية الحساسة دون رقابة بشرية واضحة:**</text:p>
            <text:p><text:s text:c="4"/>* <text:s text:c="2"/>**المخاطر:** **Context 0** يؤكد على "التصاف" (Alignment) و"الاستقرار التنظيمي". إذا أدى الذكاء الاصطناعي إلى توصيات متضاربة بين الوحدات (مثلاً: التسويق يريد خصماً، والعمليات تريد الحفاظ على هامش ربح)، فإن ذلك يزيد التعقيد الإداري والصراعات الداخلية. المبدأ يقول "لا تصبح أداة معزولة"، لذا يجب أن يكون الذكاء الاصطناعي جزءاً من نظام متكامل وليس قراراً ذاتياً يخلق فوضى تنسيقية.</text:p>
            <text:p/>
            <text:p>### الخلاصة وفق فلسفة باكيت:</text:p>
            <text:p/>
            <text:p>* <text:s text:c="2"/>**المتوافق:** أي حالة ذكاء اصطناعي **تختفي في الخلفية** (Invisible Infrastructure كما في **Context 3**)، وتعمل على **أتمتة المهام الروتينية المعقدة**، وتوفر **بيانات واضحة وموحدة** للقرارات.</text:p>
            <text:p>* <text:s text:c="2"/>**غير المتوافق:** أي حالة ذكاء اصطناعي **تبرز في المقدمة** وتتطلب من التاجر أو المدير تعلم أدوات جديدة معقدة، أو تنتج مخرجات غير موثوقة تتطلب جهداً إضافياً للمراجعة، أو تخلق عزلة بين البيانات والقرارات البشرية.</text:p>
            <text:p/>
            <text:p>الهدف النهائي، كما يقول **Context 1**: "عندما ينجح التجار، تنجح باكيت". لذا، أي ذكاء اصطناعي يزيد من عبء التاجر، حتى لو كان "ذكياً"، فهو فاشل وفق فلسفة باكيت.</text:p>
          </table:table-cell>
          <table:table-cell table:number-columns-repeated="16378"/>
        </table:table-row>
        <table:table-row table:style-name="ro3">
          <table:table-cell office:value-type="float" office:value="38" table:style-name="ce12">
            <text:p>38</text:p>
          </table:table-cell>
          <table:table-cell office:value-type="string" table:style-name="ce7">
            <text:p>Cross-Document Synthesis</text:p>
          </table:table-cell>
          <table:table-cell office:value-type="string" table:style-name="ce7">
            <text:p>Write an executive summary (one page) combining both documents: who Bakeet is, how it operates, and how AI will fit into its future.</text:p>
          </table:table-cell>
          <table:table-cell office:value-type="string" table:style-name="ce7">
            <text:p>**Executive Summary: Bakeet’s Operating System &amp; AI Integration Strategy**</text:p>
            <text:p/>
            <text:p>**1. Who Bakeet Is**</text:p>
            <text:p>Bakeet is not merely a marketplace or mobile application; it is an **operating system for sustainable commerce**. Built to simplify how merchants sell, operate, deliver, and grow, Bakeet aims to connect people, processes, services, and data into one integrated ecosystem. The purpose of the *Bakeet Book* (the Founding Draft) is to establish a common language, define operational responsibilities, and set the governance principles that will guide the company’s evolution. Bakeet’s philosophy is rooted in the belief that technology alone is insufficient; success requires a structured framework that reduces complexity and aligns all stakeholders toward shared goals.</text:p>
            <text:p/>
            <text:p>**2. How Bakeet Operates**</text:p>
            <text:p>The *Bakeet Book* defines the company’s operational foundation, focusing on clarity of ownership and execution. Key operational pillars include:</text:p>
            <text:p>* <text:s text:c="2"/>**The Maestro Office:** Acts as the central command center, monitoring company-wide KPIs, ensuring strategic alignment, and providing executive visibility. It ensures that strategy is translated into execution and that cross-functional issues are resolved efficiently.</text:p>
            <text:p>* <text:s text:c="2"/>**Business Units:** The *Social Commerce Business Unit* owns product portfolios, content strategy, and sales performance, while other units manage operations, technology, and customer support.</text:p>
            <text:p>* <text:s text:c="2"/>**Governance &amp; Rhythm:** Bakeet operates on a strict "operational rhythm" where regular reviews ensure initiatives move forward without delay. The *Maestro Office* owns company-wide KPI governance, ensuring that every department contributes to the overarching strategic vision.</text:p>
            <text:p>* <text:s text:c="2"/>**Principle of Simplicity:** Every capability within Bakeet must **reduce complexity, never increase it**. This applies to internal processes, customer experiences, and vendor interactions.</text:p>
            <text:p/>
            <text:p>**3. How AI Will Fit Into Bakeet’s Future**</text:p>
            <text:p>AI is positioned not just as a technical tool, but as a **business transformation tool** that must be "Bakeet-ized"—customized to align with Bakeet’s specific business model, customer behavior, and operational workflows. The integration of Generative AI (GenAI) follows a phased, risk-mitigated approach:</text:p>
            <text:p/>
            <text:p>* <text:s text:c="2"/>**Phase 1: Internal Productivity &amp; Governance (Immediate):**</text:p>
            <text:p><text:s text:c="4"/>* <text:s text:c="2"/>**Focus:** Tools that support the *Maestro Office* and internal teams.</text:p>
            <text:p><text:s text:c="4"/>* <text:s text:c="2"/>**Use Cases:** *Management Report Assistant* (for real-time KPI visibility and executive dashboards), *Internal Knowledge Assistant* (for SOPs and policies), and *Meeting Summary Assistant*.</text:p>
            <text:p><text:s text:c="4"/>* <text:s text:c="2"/>**Goal:** Reduce manual work, improve operational transparency, and ensure leadership has accurate, timely information for decision-making.</text:p>
            <text:p/>
            <text:p>* <text:s text:c="2"/>**Phase 2: Customer &amp; Vendor Experience (90-Day Pilot):**</text:p>
            <text:p><text:s text:c="4"/>* <text:s text:c="2"/>**Focus:** Enhancing the core customer and vendor journey.</text:p>
            <text:p><text:s text:c="4"/>* <text:s text:c="2"/>**Use Cases:** *Customer Support Assistant*, *Vendor Performance Assistant*, and *Complaint Analyzer*.</text:p>
            <text:p><text:s text:c="4"/>* <text:s text:c="2"/>**Goal:** Improve response times, streamline vendor management, and enhance customer satisfaction while keeping final judgment with human operators.</text:p>
            <text:p/>
            <text:p>* <text:s text:c="2"/>**Phase 3: Revenue Growth &amp; Strategic Intelligence (Post-Pilot):**</text:p>
            <text:p><text:s text:c="4"/>* <text:s text:c="2"/>**Focus:** Driving sales and strategic insights.</text:p>
            <text:p><text:s text:c="4"/>* <text:s text:c="2"/>**Use Cases:** *Product Recommendation Engine*, *Smart Search*, *Personalized Promotions*, and *Demand Forecasting*.</text:p>
            <text:p><text:s text:c="4"/>* <text:s text:c="2"/>**Goal:** Leverage AI to personalize the customer experience, optimize inventory, and identify market opportunities, all while maintaining strict data governance and human oversight.</text:p>
            <text:p/>
            <text:p>**Conclusion**</text:p>
            <text:p>Bakeet’s future success depends on integrating AI seamlessly into its existing operational framework. By starting with internal productivity tools that support the *Maestro Office* and expanding outward to customer-facing applications, Bakeet will ensure that AI reduces complexity, enhances decision-making, and drives sustainable growth without compromising governance or human accountability.</text:p>
          </table:table-cell>
          <table:table-cell office:value-type="string" table:style-name="ce8">
            <text:p>اكتب ملخصاً تنفيذياً (صفحة واحدة) يجمع بين الوثيقتين: من هي باكيت، وكيف تعمل، وكيف سيندمج الذكاء الاصطناعي في مستقبلها.</text:p>
          </table:table-cell>
          <table:table-cell office:value-type="string" table:style-name="ce14">
            <text:p>**الملخص التنفيذي: باكيت – نظام تشغيل التجارة الموحّد**</text:p>
            <text:p/>
            <text:p>**من هي باكيت؟**</text:p>
            <text:p>باكيت هي أكثر من مجرد منصة تجارة إلكترونية؛ إنها شركة بنية تحتية تجارية (Commerce Infrastructure Company) تهدف إلى تبسيط كيفية بيع التجار، وتشغيل أعمالهم، وتسليم منتجاتهم، ونموهم. لا تُعرف باكيت بالمنتجات التي تبيعها، بل بالمشكلات التي تحلها. تتكون باكيت من خطوط أعمال متميزة (مثل المنصة، والتجارة الاجتماعية، والخدمات اللوجستية) لكنها تعمل كنظام واحد متكامل تحت فلسفة "شركة واحدة، نظام تشغيل واحد". هدفها النهائي هو مساعدة التجار على النمو من خلال تجربة تجارية أبسط وأكثر اتصالاً، حيث تساهم كل تفاعل وتجربة وتسليم في هذا الهدف الموحد.</text:p>
            <text:p/>
            <text:p>**كيف تعمل باكيت؟ (نظام التشغيل)**</text:p>
            <text:p>تعتمد باكيت على "نظام التشغيل الخاص بها" الذي يضمن التماسك والشفافية عبر جميع الوحدات:</text:p>
            <text:p>1. <text:s/>**التكامل وليس العزل:** لا تعمل أي وحدة بشكل مستقل. كل استثمار تقني، وعملية تشغيلية، وتفاعل مع العميل يخدم الغرض المشترك.</text:p>
            <text:p>2. <text:s/>**دور مكتب المايسترو (Maestro Office):** يعمل كمركز للتحكم الاستراتيجي، مسؤول عن الحوكمة، ومراقبة مؤشرات الأداء الرئيسية (KPIs) على مستوى الشركة، وضمان "التصاف" (Alignment) بين الوحدات المختلفة. يهدف إلى إزالة العقبات التشغيلية وضمان أن تتحرك المنظمة ككيان واحد متناغم.</text:p>
            <text:p>3. <text:s/>**المبدأ الأساسي:** "كل قدرة يجب أن تقلل التعقيد ولا تزيده أبداً". التكنولوجيا يجب أن تكون خلفية داعمة (تمكّن التجارة بصمت) وليست مصدراً للتعقيد. النجاح يُقاس بقدرة النظام على جعل العمليات قابلة للتكرار، وشفافة، وسهلة الاستخدام للتجار.</text:p>
            <text:p/>
            <text:p>**دمج الذكاء الاصطناعي في المستقبل**</text:p>
            <text:p>سيكون الذكاء الاصطناعي (AI) عنصراً أساسياً في تعزيز كفاءة النظام وقدرته على التبسيط، وليس مجرد أداة معزولة:</text:p>
            <text:p>1. <text:s/>**تمكين القرارات الاستراتيجية:** سيتم استخدام أدوات مثل "مساعد التقارير الإدارية" لمراقبة مؤشرات الأداء بدقة وسرعة، مما يدعم مكتب المايسترو في اتخاذ قرارات مستنيرة وتوجيه الموارد نحو الأولويات الاستراتيجية.</text:p>
            <text:p>2. <text:s/>**تعزيز تجربة التاجر والعميل:** سيتم تطبيق الذكاء الاصطناعي في مجالات مثل دعم العملاء الذكي، وتحليلات التاجر، وتحسين تجربة البحث، بهدف أتمتة التعقيدات الروتينية وإتاحة وقت التاجر للتركيز على النمو.</text:p>
            <text:p>3. <text:s/>**الإشراف والحوكمة:** ستقوم "مجموعة عمل الذكاء الاصطناعي" (AI Working Group) باختيار حالات الاستخدام، ومراجعة المخاطر، وضمان أن حلول الذكاء الاصطناعي تلتزم بمبدأ "تقليل التعقيد". سيتم تقييم كل حل ذكي بناءً على قدرته على دعم نظام التشغيل الموحد وليس خلق عزلة أو تعقيداً جديداً.</text:p>
            <text:p/>
            <text:p>**الخلاصة:**</text:p>
            <text:p>ستستمر باكيت في كونها بنية تحتية تجارية موحدة، حيث يعمل الذكاء الاصطناعي كقوة دافعة لتعزيز الكفاءة، والشفافية، والبساطة، مما يضمن بقاء التجار في قلب العملية ونجاح النظام ككل.</text:p>
          </table:table-cell>
          <table:table-cell table:number-columns-repeated="16378"/>
        </table:table-row>
        <table:table-row table:style-name="ro3">
          <table:table-cell office:value-type="float" office:value="39" table:style-name="ce12">
            <text:p>39</text:p>
          </table:table-cell>
          <table:table-cell office:value-type="string" table:style-name="ce7">
            <text:p>Cross-Document Synthesis</text:p>
          </table:table-cell>
          <table:table-cell office:value-type="string" table:style-name="ce7">
            <text:p>Prepare a SWOT analysis for Bakeet using evidence from both documents, and recommend the top 3 priorities for the next 12 months.</text:p>
          </table:table-cell>
          <table:table-cell office:value-type="string" table:style-name="ce7">
            <text:p>Based on the provided documents, here is the SWOT analysis for Bakeet, followed by three strategic priorities for the next 12 months.</text:p>
            <text:p/>
            <text:p>### **SWOT Analysis for Bakeet**</text:p>
            <text:p/>
            <text:p>| **Strengths (Internal)** | **Weaknesses (Internal)** |</text:p>
            <text:p>| :--- | :--- |</text:p>
            <text:p>| **1. Clear Operational Framework:** The *Bakeet Book* establishes a definitive "Operating System" with clear roles (e.g., Maestro Office), governance, and a common language. This reduces ambiguity and aligns cross-functional teams.&lt;br&gt;**2. Philosophy of Simplicity:** The core principle that "every capability must reduce complexity" provides a strong filter for decision-making, preventing feature bloat and operational clutter.&lt;br&gt;**3. Integrated Business Model:** Bakeet operates as a unified ecosystem (Commerce Platform, Logistics, Social Commerce) rather than siloed departments, allowing for holistic data sharing and operational synergy.&lt;br&gt;**4. Strategic Governance:** The existence of the Maestro Office ensures continuous monitoring of company-wide KPIs and strategic execution, preventing drift from the founding vision. | **1. Early-Stage Maturity:** As indicated by the "Founding Draft" status of the *Bakeet Book*, the company is still codifying its culture and processes. Operational maturity may still be developing.&lt;br&gt;**2. Dependency on Human Judgment:** The AI strategy explicitly states that "final judgment and accountability remain with people." This reliance on human oversight can slow down automation and create bottlenecks if staff are not adequately trained or if processes are not streamlined.&lt;br&gt;**3. Data Integration Challenges:** The AI guide notes that moving from "anonymized reports" to "live customer/financial data" requires approval from IT, Legal, and business owners. This governance hurdle can delay the implementation of high-value AI use cases.&lt;br&gt;**4. Limited AI Scope Currently:** Initial AI efforts are focused on "easiest starting points" (documents/SOPs). Advanced revenue-generating AI (recommendations, smart search) is reserved for post-pilot phases, meaning immediate competitive advantages in personalization may be limited. |</text:p>
            <text:p/>
            <text:p>| **Opportunities (External)** | **Threats (External)** |</text:p>
            <text:p>| :--- | :--- |</text:p>
            <text:p>| **1. AI-Driven Efficiency:** Integrating GenAI (Management Report Assistant, Internal Knowledge Assistant) can significantly reduce manual work and accelerate decision-making for the Maestro Office and leadership, enhancing operational speed.&lt;br&gt;**2. Enhanced Customer Experience:** The planned rollout of Smart Search, Product Recommendations, and Personalized Marketing (Phase 3) offers a chance to differentiate Bakeet in the social commerce market by offering a hyper-personalized shopping journey.&lt;br&gt;**3. Vendor &amp; Supply Chain Optimization:** Using AI for Vendor Performance and Demand Forecasting can improve inventory accuracy and vendor reliability, strengthening the "Logistics &amp; Fulfillment" business line.&lt;br&gt;**4. Scalable Knowledge Management:** An Internal Knowledge Assistant can streamline onboarding and policy adherence as the company grows, reducing the administrative burden of scaling. | **1. Data Privacy &amp; Compliance Risks:** Moving from anonymized data to live customer/financial data increases exposure to regulatory risks (e.g., data protection laws). Failure to secure proper IT/Legal approval could lead to breaches or penalties.&lt;br&gt;**2. AI Hallucination &amp; Inaccuracy:** If AI tools (like Customer Support Assistants or Recommendation Engines) provide incorrect information, it could damage brand trust and customer satisfaction, violating the "reduce complexity" principle by creating confusion.&lt;br&gt;**3. Integration Complexity:** There is a risk that adding AI layers (Smart Search, Recommendations) could complicate the user experience if not seamlessly integrated with the existing "Bakeet-izing" workflow. This contradicts the core philosophy of simplicity.&lt;br&gt;**4. Market Competition:** The social commerce and marketplace space is highly competitive. If Bakeet’s AI rollout (planned over 90 days + expansion) is too slow, competitors may capture market share with more advanced personalization features. |</text:p>
            <text:p/>
            <text:p>---</text:p>
            <text:p/>
            <text:p>### **Top 3 Priorities for the Next 12 Months**</text:p>
            <text:p/>
            <text:p>Based on the SWOT analysis and the phased AI implementation plan, here are the recommended priorities:</text:p>
            <text:p/>
            <text:p>#### **1. Solidify the "Maestro Office" AI Foundation (Months 1–3)**</text:p>
            <text:p>* <text:s text:c="2"/>**Objective:** Deploy the **Management Report Assistant** and **Internal Knowledge Assistant** to operationalize the Maestro Office’s mission.</text:p>
            <text:p>* <text:s text:c="2"/>**Rationale:** The Maestro Office is critical for strategic alignment and KPI monitoring. By automating data aggregation and knowledge retrieval, Bakeet can immediately reduce operational complexity and improve executive decision-making speed. This aligns with the "reduce complexity" philosophy and addresses the weakness of early-stage operational maturity.</text:p>
            <text:p>* <text:s text:c="2"/>**Key Action:** Integrate existing document sources (SOPs, policies, KPIs) into the AI system while maintaining strict governance (as per Context 2).</text:p>
            <text:p/>
            <text:p>#### **2. Execute the 90-Day AI Pilot with Strict Governance (Months 4–6)**</text:p>
            <text:p>* <text:s text:c="2"/>**Objective:** Launch the pilot for **Customer Support Assistant** and **Vendor Performance Assistant**.</text:p>
            <text:p>* <text:s text:c="2"/>**Rationale:** This phase tests AI’s value in customer and vendor interactions without exposing the business to high-risk data (financial/live customer data). It allows Bakeet to refine its "Bakeet-izing" process—ensuring AI aligns with its specific business model and customer behavior.</text:p>
            <text:p>* <text:s text:c="2"/>**Key Action:** Establish clear feedback loops between human agents/vendor managers and the AI tools to ensure accuracy and maintain human accountability. Monitor for any increase in complexity in user workflows.</text:p>
            <text:p/>
            <text:p>#### **3. Prepare for Phase 3 Expansion: Personalization &amp; Revenue Growth (Months 7–12)**</text:p>
            <text:p>* <text:s text:c="2"/>**Objective:** Lay the groundwork for **Smart Search**, **Product Recommendations**, and **Demand Forecasting**.</text:p>
            <text:p>* <text:s text:c="2"/>**Rationale:** To remain competitive in social commerce, Bakeet must move beyond internal efficiency to external revenue growth. However, this requires robust data integration and governance. The first 6 months should be used to secure IT/Legal approvals for live data access and to train the AI on Bakeet-specific product catalogs and customer data.</text:p>
            <text:p>* <text:s text:c="2"/>**Key Action:** Collaborate with the Social Commerce Business Unit to define specific use cases for recommendations and search, ensuring they simplify (not complicate) the customer journey. Begin data cleansing and integration efforts to support these advanced AI models.</text:p>
          </table:table-cell>
          <table:table-cell office:value-type="string" table:style-name="ce8">
            <text:p>أعدّ تحليل SWOT لباكيت باستخدام أدلة من كلتا الوثيقتين، ثم أوصِ بأهم ثلاث أولويات للاثني عشر شهراً القادمة.</text:p>
          </table:table-cell>
          <table:table-cell office:value-type="string" table:style-name="ce14">
            <text:p>بناءً على الوثيقتين المقدمتين (**BAKEET_The_Bakeet_Book** و **Wisam_7185.docx**)، إليك تحليل SWOT لباكيت، متبوعاً بأهم ثلاث أولويات استراتيجية للـ 12 شهراً القادمة.</text:p>
            <text:p/>
            <text:p>### تحليل SWOT لباكيت</text:p>
            <text:p/>
            <text:p>| **نقاط القوة (Strengths)** | **نقاط الضعف (Weaknesses)** |</text:p>
            <text:p>| :--- | :--- |</text:p>
            <text:p>| **1. نظام تشغيل موحد (One OS):** فلسفة "شركة واحدة، نظام تشغيل واحد" تضمن التماسك بين خطوط الأعمال (المنصة، اللوجستيات، التجارة الاجتماعية) وتقلل من التعارض الداخلي أو العزلة بين الأقسام.&lt;br&gt;**2. حوكمة مركزية قوية:** وجود "مكتب المايسترو" يضمن مراقبة مؤشرات الأداء الرئيسية (KPIs) على مستوى الشركة، ويحافظ على التصاف الاستراتيجي (Alignment) ويمنع الفوضى التشغيلية.&lt;br&gt;**3. فلسفة واضحة للتبسيط:** مبدأ "كل قدرة تقلل التعقيد ولا تزيده أبداً" يوفر بوصلة واضحة لاتخاذ القرارات التقنية والتشغيلية، مما يعزز تجربة التاجر والعميل.&lt;br&gt;**4. بنية تحتية تجارية شاملة:** التوسع من مجرد "سوق" (Marketplace) إلى "بنية تحتية تجارية" (Commerce Infrastructure) يمنح باكيت ميزة تنافسية في التحكم بدورة التسليم والتجربة الكاملة. | **1. الاعتماد المبكر على الذكاء الاصطناعي (مخاطر التنفيذ):** خطة الذكاء الاصطناعي تعتمد على "نماذج أولية" (Pilots) وبيانات مجهولة المصدر في المراحل الأولى، مما قد يؤدي إلى فجوة بين التوقعات والواقع إذا لم تُدار توقعات الفرق بدقة.&lt;br&gt;**2. تعقيد إدارة البيانات الحساسة:** تحديد مصادر البيانات (الطلبات، العملاء، الموردين...) وقواعد الحساسية يتطلب جهداً كبيراً في الحوكمة، وأي خطأ قد يعرض السمعة للخطر أو يوقف العمليات.&lt;br&gt;**3. التحدي الثقافي في تبني الأدوات الجديدة:** الانتقال من العمليات اليدوية أو القديمة إلى أدوات ذكية (مثل مساعد التقارير) يتطلب تغييراً في سلوك الموظفين وثقتهم في الآلة، وهو ما قد يواجه مقاومة إذا لم يُدار بعناية (كما يشير السياق لضرورة "الرقابة البشرية" في القرارات النهائية). |</text:p>
            <text:p>| **نقاط الفرص (Opportunities)** | **تهديدات (Threats)** |</text:p>
            <text:p>| **1. التوسع السريع في حالات استخدام الذكاء الاصطناعي:** بعد نجاح الـ 90 يوماً الأولى، يمكن التوسع في مجالات حيوية مثل: دعم العملاء، التوصيات الذكية، البحث الذكي، وأداء الموردين، مما يعزز الكفاءة بشكل كبير.&lt;br&gt;**2. تحسين تجربة التاجر عبر الرؤى التنبؤية:** استخدام بيانات التاريخ لتوقع احتياجات العملاء أو تحسين المخزون، مما يرفع قيمة الخدمة المقدمة للتجار ويجذب موردين جدد.&lt;br&gt;**3. تعزيز الثقة والشفافية:** من خلال لوحات معلومات ذكية ودقيقة، يمكن لباكيت بناء ثقة أكبر لدى المستثمرين والشركاء من خلال إظهار كفاءة التشغيل وشفافية الأداء.&lt;br&gt;**4. أتمتة العمليات الروتينية:** تحرير الموارد البشرية من المهام الإدارية (مثل إعداد التقارير) للتركيز على الإبداع والاستراتيجية، مما يرفع الإنتاجية العامة. | **1. مخاطر الخصوصية والأمان:** دمج مصادر بيانات متعددة (سواء من التجارة الاجتماعية أو المنصة الرئيسية) يزيد من سطح الهجوم المحتمل للاختراق أو تسريب البيانات، خاصة مع وجود بيانات حساسة للعملاء والموردين.&lt;br&gt;**2. الاعتماد الزائد على الخوارزميات:** إذا لم يتم الحفاظ على "الحكم البشري النهائي" كما ذكرت الوثيقة، قد تؤدي الأخطاء في الذكاء الاصطناعي (مثل توصيات خاطئة أو دعم عملي سيء) إلى ضرر مباشر بالسمعة ورضا العملاء.&lt;br&gt;**3. التعقيد التشغيلي غير المقصود:** إدخال تقنيات ذكية معقدة قد ينتهك مبدأ "تقليل التعقيد" إذا لم يتم دمجها بسلاسة في نظام التشغيل الحالي، مما يخلق عبئاً جديداً على الفرق بدلاً من تخفيفه.&lt;br&gt;**4. المنافسة في تبني الذكاء الاصطناعي:** دخول منافسين أقوياء بتقنيات ذكاء اصطناعي متقدمة قد يتفوقون على باكيت في سرعة الاستجابة أو دقة التوصيات إذا لم تسرع باكيت من وتيرة نشر حلولها بعد مرحلة التجربة. |</text:p>
            <text:p/>
            <text:p>---</text:p>
            <text:p/>
            <text:p>### أهم ثلاث أولويات للـ 12 شهراً القادمة</text:p>
            <text:p/>
            <text:p>بناءً على تحليل SWOT والوثائق، إليك الأولويات الاستراتيجية:</text:p>
            <text:p/>
            <text:p>#### 1. إتمام واختبار النموذج الأولي لمساعد التقارير الإدارية (Executive Reporting Assistant) بنجاح خلال الـ 60 يوماً الأولى</text:p>
            <text:p>* <text:s text:c="2"/>**السبب:** هذا المشروع هو حجر الزاوية في تمكين "مكتب المايسترو" من اتخاذ قرارات دقيقة وسريعة. الوثيقة تشير إلى أن المرحلة الحالية (الأيام 31-60) تركز على البناء والاختبار باستخدام بيانات مجهولة المصدر.</text:p>
            <text:p>* <text:s text:c="2"/>**الإجراء:**</text:p>
            <text:p><text:s text:c="4"/>* <text:s text:c="2"/>التأكد من دقة البيانات المدمجة من المصادر المحددة (الطلبات، العملاء، الموردين...).</text:p>
            <text:p><text:s text:c="4"/>* <text:s text:c="2"/>مقارنة ملخصات الذكاء الاصطناعي مع الملخصات البشرية لتقليل الأخطاء.</text:p>
            <text:p><text:s text:c="4"/>* <text:s text:c="2"/>تحديد "مؤشرات النجاح" بوضوح (مثل: تقليل وقت إعداد التقرير من ساعات إلى دقائق، ودقة المعلومات بنسبة &gt;95%).</text:p>
            <text:p/>
            <text:p>#### 2. وضع حوكمة بيانات صارمة وموافقة على أدوات الذكاء الاصطناعي المسموح بها</text:p>
            <text:p>* <text:s text:c="2"/>**السبب:** قبل التوسع في أي استخدام للذكاء الاصطناعي (كما هو مذكور في سياق الـ 90 يوماً القادمة)، يجب حل مشكلة "مصادر البيانات" و"قواعد الحساسية". أي خطأ في هذا المجال قد يؤدي لتهديد أمني أو قانوني.</text:p>
            <text:p>* <text:s text:c="2"/>**الإجراء:**</text:p>
            <text:p><text:s text:c="4"/>* <text:s text:c="2"/>إصدار "ميثاق الذكاء الاصطناعي" (AI Pilot Charter) الذي يحدد بوضوح أي البيانات يمكن استخدامها، وأي الأدوات مسموح بها.</text:p>
            <text:p><text:s text:c="4"/>* <text:s text:c="2"/>تعيين "مالك للنموذج" (Pilot Owner) وفريق واضح مسؤول عن المراقبة المستمرة للبيانات والمخرجات.</text:p>
            <text:p><text:s text:c="4"/>* <text:s text:c="2"/>ضمان أن جميع فرق العمل (التسويق، العمليات، المنصة) تتفق على نفس قواعد الحوكمة لتجنب التناقضات.</text:p>
            <text:p/>
            <text:p>#### 3. تدريب الفرق على "التصاف مع النظام" واستخدام الذكاء الاصطناعي كأداة تمكين وليس بديلاً</text:p>
            <text:p>* <text:s text:c="2"/>**السبب:** الوثيقة تؤكد أن "الحكم البشري النهائي والمسؤولية تبقى مع الناس". التحدي الأكبر ليس تقنياً، بل ثقافياً. يجب أن يدرك الموظفون أن الذكاء الاصطناعي يهدف لتقليل التعقيد و"تجربة التجارة بصمت".</text:p>
            <text:p>* <text:s text:c="2"/>**الإجراء:**</text:p>
            <text:p><text:s text:c="4"/>* <text:s text:c="2"/>ورش عمل لتوضيح كيف يدعم الذكاء الاصطناعي عمل كل قسم (بدلاً من تهديده).</text:p>
            <text:p><text:s text:c="4"/>* <text:s text:c="2"/>التركيز على مبدأ "البساطة": أي أداة ذكية جديدة يجب أن تختفي في الخلفية وتعمل دون أن تطلب من الموظف تعلم مهارات تقنية معقدة.</text:p>
            <text:p><text:s text:c="4"/>* <text:s text:c="2"/>تشجيع التغذية الراجعة من المستخدمين النهائيين (التجار والموظفين) لتحسين تجربة الذكاء الاصطناعي بشكل مستمر، مع الحفاظ على المراقبة البشرية للقرارات الحساسة.</text:p>
          </table:table-cell>
          <table:table-cell table:number-columns-repeated="16378"/>
        </table:table-row>
        <table:table-row table:style-name="ro2">
          <table:table-cell office:value-type="float" office:value="40" table:style-name="ce12">
            <text:p>40</text:p>
          </table:table-cell>
          <table:table-cell office:value-type="string" table:style-name="ce7">
            <text:p>Demo-Killer Tests</text:p>
          </table:table-cell>
          <table:table-cell office:value-type="string" table:style-name="ce7">
            <text:p>What was Bakeet's revenue last quarter? (Expected: not available in documents)</text:p>
          </table:table-cell>
          <table:table-cell office:value-type="string" table:style-name="ce7">
            <text:p>Based on the provided context, there is no information regarding Bakeet's specific revenue figures for last quarter. The documents outline the company's strategic structure, business units (such as Social Commerce, Fulfillment, and Finance &amp; Administration), and operational philosophy, but do not contain financial reports or specific monetary data.</text:p>
          </table:table-cell>
          <table:table-cell office:value-type="string" table:style-name="ce8">
            <text:p>كم بلغت إيرادات باكيت في الربع الأخير؟ (المتوقع: غير متوفر في الوثائق)</text:p>
          </table:table-cell>
          <table:table-cell office:value-type="string" table:style-name="ce14">
            <text:p>لا تتوفر معلومات حول إيرادات باكيت في الربع الأخير في السياق المقدم.</text:p>
          </table:table-cell>
          <table:table-cell table:number-columns-repeated="16378"/>
        </table:table-row>
        <table:table-row table:style-name="ro2">
          <table:table-cell office:value-type="float" office:value="41" table:style-name="ce12">
            <text:p>41</text:p>
          </table:table-cell>
          <table:table-cell office:value-type="string" table:style-name="ce7">
            <text:p>Demo-Killer Tests</text:p>
          </table:table-cell>
          <table:table-cell office:value-type="string" table:style-name="ce7">
            <text:p>How many merchants and employees does Bakeet currently have? (Expected: not available)</text:p>
          </table:table-cell>
          <table:table-cell office:value-type="string" table:style-name="ce7">
            <text:p>Based on the provided context, there is no information regarding the current number of merchants or employees at Bakeet. The documents focus on the company's business structure, philosophy, and operational model rather than specific headcount or merchant statistics.</text:p>
          </table:table-cell>
          <table:table-cell office:value-type="string" table:style-name="ce8">
            <text:p>كم عدد التجار والموظفين لدى باكيت حالياً؟ (المتوقع: غير متوفر)</text:p>
          </table:table-cell>
          <table:table-cell office:value-type="string" table:style-name="ce14">
            <text:p>لا تتوفر معلومات حول عدد التجار أو الموظفين الحاليين لدى باكيت في السياق المقدم.</text:p>
          </table:table-cell>
          <table:table-cell table:number-columns-repeated="16378"/>
        </table:table-row>
        <table:table-row table:style-name="ro3">
          <table:table-cell office:value-type="float" office:value="42" table:style-name="ce13">
            <text:p>42</text:p>
          </table:table-cell>
          <table:table-cell office:value-type="string" table:style-name="ce10">
            <text:p>Demo-Killer Tests</text:p>
          </table:table-cell>
          <table:table-cell office:value-type="string" table:style-name="ce10">
            <text:p>Who are Bakeet's main competitors in Iraq? (Expected: not covered — tests whether the AI stays grounded)</text:p>
          </table:table-cell>
          <table:table-cell office:value-type="string" table:style-name="ce10">
            <text:p>Based on the provided context, there is no information identifying Bakeet's main competitors in Iraq. The documents mention that Bakeet is "not building another marketplace," but they do not list or name specific competing companies.</text:p>
          </table:table-cell>
          <table:table-cell office:value-type="string" table:style-name="ce11">
            <text:p>من هم المنافسون الرئيسيون لباكيت في العراق؟ (المتوقع: غير مذكور — لاختبار التزام الذكاء الاصطناعي بالمصادر)</text:p>
          </table:table-cell>
          <table:table-cell office:value-type="string" table:style-name="ce15">
            <text:p>لا تتوفر معلومات حول المنافسين الرئيسيين لباكيت في العراق في السياق المقدم.</text:p>
          </table:table-cell>
          <table:table-cell table:number-columns-repeated="16378"/>
        </table:table-row>
        <table:table-row table:number-rows-repeated="1048533" table:style-name="ro6">
          <table:table-cell table:number-columns-repeated="16384"/>
        </table:table-row>
      </table:table>
      <table:database-ranges>
        <table:database-range table:target-range-address="Question_Set.A1:Question_Set.F43" table:name="BakeetQuestions"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6-07-13T13:10:43Z</meta:creation-date>
    <dc:date>2026-07-13T15:57:41Z</dc:date>
  </office:meta>
</office:document-meta>
</file>